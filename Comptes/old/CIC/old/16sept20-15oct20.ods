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cript-lb.xml" manifest:media-type="text/xml"/>
  <manifest:file-entry manifest:full-path="Basic/VBAProject/FormulaModule.xml" manifest:media-type="text/xml"/>
  <manifest:file-entry manifest:full-path="Basic/VBAProject/Sheet2.xml" manifest:media-type="text/xml"/>
  <manifest:file-entry manifest:full-path="Basic/VBAProject/LastClickModule.xml" manifest:media-type="text/xml"/>
  <manifest:file-entry manifest:full-path="Basic/VBAProject/OrderingModule.xml" manifest:media-type="text/xml"/>
  <manifest:file-entry manifest:full-path="Basic/VBAProject/ThisWorkbook.xml" manifest:media-type="text/xml"/>
  <manifest:file-entry manifest:full-path="Basic/VBAProject/Sheet1.xml" manifest:media-type="text/xml"/>
  <manifest:file-entry manifest:full-path="Basic/VBAProject/Sheet3.xml" manifest:media-type="text/xml"/>
  <manifest:file-entry manifest:full-path="Basic/VBAProject/Sheet4.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351cm"/>
    </style:style>
    <style:style style:name="co2" style:family="table-column">
      <style:table-column-properties fo:break-before="auto" style:column-width="12.151cm"/>
    </style:style>
    <style:style style:name="co3" style:family="table-column">
      <style:table-column-properties fo:break-before="auto" style:column-width="3.136cm"/>
    </style:style>
    <style:style style:name="co4" style:family="table-column">
      <style:table-column-properties fo:break-before="auto" style:column-width="1.674cm"/>
    </style:style>
    <style:style style:name="co5" style:family="table-column">
      <style:table-column-properties fo:break-before="auto" style:column-width="5.405cm"/>
    </style:style>
    <style:style style:name="co6" style:family="table-column">
      <style:table-column-properties fo:break-before="auto" style:column-width="4.509cm"/>
    </style:style>
    <style:style style:name="co7" style:family="table-column">
      <style:table-column-properties fo:break-before="auto" style:column-width="1.54cm"/>
    </style:style>
    <style:style style:name="ro1" style:family="table-row">
      <style:table-row-properties style:row-height="0.487cm" fo:break-before="auto" style:use-optimal-row-height="true"/>
    </style:style>
    <style:style style:name="ro2" style:family="table-row">
      <style:table-row-properties style:row-height="0.489cm" fo:break-before="auto" style:use-optimal-row-height="true"/>
    </style:style>
    <style:style style:name="ro3" style:family="table-row">
      <style:table-row-properties style:row-height="0.998cm" fo:break-before="auto" style:use-optimal-row-height="false"/>
    </style:style>
    <style:style style:name="ro4" style:family="table-row">
      <style:table-row-properties style:row-height="0.935cm" fo:break-before="auto" style:use-optimal-row-height="true"/>
    </style:style>
    <style:style style:name="ta1" style:family="table" style:master-page-name="PageStyle_5f_Cpt_20_14252_20_00020144101">
      <style:table-properties table:display="true" style:writing-mode="lr-tb"/>
    </style:style>
    <style:style style:name="ta2" style:family="table" style:master-page-name="PageStyle_5f_hidden">
      <style:table-properties table:display="false" style:writing-mode="lr-tb"/>
    </style:style>
    <number:date-style style:name="N30" number:automatic-order="true" number:format-source="language">
      <number:day/>
      <number:text>/</number:text>
      <number:month/>
      <number:text>/</number:text>
      <number:year/>
    </number:date-style>
    <style:style style:name="ce10" style:family="table-cell" style:parent-style-name="Header">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74pt solid #666666" fo:background-color="#d5e1ef" style:diagonal-bl-tr="none" style:diagonal-tl-br="none" style:text-align-source="value-type" style:repeat-content="false" fo:wrap-option="no-wrap" fo:border-left="none" style:direction="ltr" fo:border-right="none" style:rotation-angle="0" style:rotation-align="none" style:shrink-to-fit="false" fo:border-top="0.74pt solid #666666"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TableHeader">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5" style:family="table-cell" style:parent-style-name="Default" style:data-style-name="N30">
      <style:table-cell-properties fo:border-bottom="none" fo:background-color="#d5e1ef" style:diagonal-bl-tr="none" style:diagonal-tl-br="none" style:text-align-source="value-type" style:repeat-content="false" fo:wrap-option="no-wrap" fo:border-left="none" style:direction="ltr" fo:border-right="0.74pt solid #666666" style:rotation-angle="0" style:rotation-align="none" style:shrink-to-fit="false" fo:border-top="non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30">
      <style:table-cell-properties fo:border-bottom="none" style:diagonal-bl-tr="none" style:diagonal-tl-br="none" style:text-align-source="value-type" style:repeat-content="false" fo:wrap-option="no-wrap" fo:border-left="none" style:direction="ltr" fo:border-right="0.74pt solid #666666" style:rotation-angle="0" style:rotation-align="none" style:shrink-to-fit="false" fo:border-top="non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order-bottom="0.74pt solid #666666"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666666"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HyperLink_20_1">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4170a9"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 style:family="table-cell" style:parent-style-name="Default">
      <style:table-cell-properties style:rotation-align="non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Header">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20" style:family="table-cell" style:parent-style-name="HyperLink_20_1">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4170a9"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fo:border-bottom="none" fo:background-color="#d5e1ef" style:diagonal-bl-tr="none" style:diagonal-tl-br="none" style:text-align-source="value-type" style:repeat-content="false" fo:wrap-option="wrap" fo:border-left="none" style:direction="ltr" fo:border-right="0.74pt solid #666666" style:rotation-angle="0" style:rotation-align="none" style:shrink-to-fit="false" fo:border-top="non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wrap" fo:border-left="none" style:direction="ltr" fo:border-right="0.74pt solid #666666" style:rotation-angle="0" style:rotation-align="none" style:shrink-to-fit="false" fo:border-top="non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order-bottom="0.74pt solid #666666" fo:background-color="#d5e1ef" style:diagonal-bl-tr="none" style:diagonal-tl-br="none" style:text-align-source="fix" style:repeat-content="false" fo:wrap-option="no-wrap" fo:border-left="none" style:direction="ltr" fo:border-right="none" style:rotation-angle="0" style:rotation-align="none" style:shrink-to-fit="false" fo:border-top="0.74pt solid #666666" style:vertical-align="middle" loext:vertical-justify="auto"/>
      <style:paragraph-properties fo:text-align="end" css3t:text-justify="auto" fo:margin-left="0cm" style:writing-mode="page"/>
      <style:text-properties fo:color="#262626" style:text-outline="false" style:text-line-through-style="none" style:text-line-through-typ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 style:family="table-cell" style:parent-style-name="Default" style:data-style-name="N145">
      <style:table-cell-properties fo:border-bottom="none" fo:background-color="#d5e1ef" style:diagonal-bl-tr="none" style:diagonal-tl-br="none" style:text-align-source="value-type" style:repeat-content="false" fo:wrap-option="no-wrap" fo:border-left="none" style:direction="ltr" fo:border-right="0.74pt solid #666666" style:rotation-angle="0" style:rotation-align="none" style:shrink-to-fit="false" fo:border-top="non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45">
      <style:table-cell-properties fo:border-bottom="none" style:diagonal-bl-tr="none" style:diagonal-tl-br="none" style:text-align-source="value-type" style:repeat-content="false" fo:wrap-option="no-wrap" fo:border-left="none" style:direction="ltr" fo:border-right="0.74pt solid #666666" style:rotation-angle="0" style:rotation-align="none" style:shrink-to-fit="false" fo:border-top="non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order-bottom="0.74pt solid #666666"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666666" style:vertical-align="middle" loext:vertical-justify="auto"/>
      <style:paragraph-properties fo:text-align="end" css3t:text-justify="auto" fo:margin-left="0cm" style:writing-mode="page"/>
      <style:text-properties fo:color="#262626" style:text-outline="false" style:text-line-through-style="none" style:text-line-through-typ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7" style:family="table-cell" style:parent-style-name="Default" style:data-style-name="N145">
      <style:table-cell-properties fo:border-bottom="0.74pt solid #666666" fo:background-color="#d5e1ef" style:diagonal-bl-tr="none" style:diagonal-tl-br="none" style:text-align-source="value-type" style:repeat-content="false" fo:wrap-option="no-wrap" fo:border-left="none" style:direction="ltr" fo:border-right="0.74pt solid #666666" style:rotation-angle="0" style:rotation-align="none" style:shrink-to-fit="false" fo:border-top="0.74pt solid #666666"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TableHeader">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9" style:family="table-cell" style:parent-style-name="Default" style:data-style-name="N145">
      <style:table-cell-properties fo:border-bottom="none" fo:background-color="#dee6ef" style:diagonal-bl-tr="none" style:diagonal-tl-br="none" style:text-align-source="value-type" style:repeat-content="false" fo:wrap-option="no-wrap" fo:border-left="none" style:direction="ltr" fo:border-right="0.74pt solid #666666" style:rotation-angle="0" style:rotation-align="none" style:shrink-to-fit="false" fo:border-top="none"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45">
      <style:table-cell-properties fo:border-bottom="0.74pt solid #666666" style:diagonal-bl-tr="none" style:diagonal-tl-br="none" style:text-align-source="value-type" style:repeat-content="false" fo:background-color="transparent" fo:wrap-option="no-wrap" fo:border-left="none" style:direction="ltr" fo:border-right="0.74pt solid #666666" style:rotation-angle="0" style:rotation-align="none" style:shrink-to-fit="false" fo:border-top="0.74pt solid #666666" style:vertical-align="middle" loext:vertical-justify="auto"/>
      <style:paragraph-properties css3t:text-justify="auto" fo:margin-left="0cm" style:writing-mode="page"/>
      <style:text-properties fo:color="#262626"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pt 14252 00020144101" table:style-name="ta1" table:print-ranges="'Cpt 14252 00020144101'.A1:'Cpt 14252 00020144101'.F31">
        <office:forms form:automatic-focus="false" form:apply-design-mode="false"/>
        <table:table-column table:style-name="co1" table:number-columns-repeated="2" table:default-cell-style-name="ce2"/>
        <table:table-column table:style-name="co2" table:default-cell-style-name="ce2"/>
        <table:table-column table:style-name="co3" table:number-columns-repeated="3" table:default-cell-style-name="ce2"/>
        <table:table-column table:style-name="co4" table:number-columns-repeated="58" table:default-cell-style-name="Default"/>
        <table:table-row table:style-name="ro1">
          <table:table-cell table:style-name="ce10" office:value-type="string" calcext:value-type="string" table:number-columns-spanned="6" table:number-rows-spanned="1">
            <text:p>Situation de votre compte START Jeunes Actifs M DEMIRDELEN MIKAIL (EUR) au 21/10/2020</text:p>
          </table:table-cell>
          <table:covered-table-cell table:number-columns-repeated="5" table:style-name="ce19" office:value-type="string" calcext:value-type="string">
            <text:p>Situation de votre compte START Jeunes Actifs M DEMIRDELEN MIKAIL (EUR) au 21/10/2020</text:p>
          </table:covered-table-cell>
          <table:table-cell table:number-columns-repeated="58"/>
        </table:table-row>
        <table:table-row table:style-name="ro1">
          <table:table-cell table:style-name="ce11" office:value-type="string" calcext:value-type="string" table:number-columns-spanned="6" table:number-rows-spanned="1">
            <text:p>R.I.B. : 30047 14252 00020144101</text:p>
          </table:table-cell>
          <table:covered-table-cell table:number-columns-repeated="5" table:style-name="ce18" office:value-type="string" calcext:value-type="string">
            <text:p>R.I.B. : 30047 14252 00020144101</text:p>
          </table:covered-table-cell>
          <table:table-cell table:number-columns-repeated="58"/>
        </table:table-row>
        <table:table-row table:style-name="ro1">
          <table:table-cell table:style-name="ce17" table:number-columns-spanned="3" table:number-rows-spanned="1"/>
          <table:covered-table-cell table:number-columns-repeated="2" table:style-name="ce17"/>
          <table:table-cell table:style-name="ce41" office:value-type="string" calcext:value-type="string" table:number-columns-spanned="2" table:number-rows-spanned="1">
            <text:p>Solde initial : </text:p>
          </table:table-cell>
          <table:covered-table-cell table:style-name="ce41" office:value-type="string" calcext:value-type="string">
            <text:p>Solde initial : </text:p>
          </table:covered-table-cell>
          <table:table-cell table:style-name="ce27" office:value-type="currency" office:currency="EUR" office:value="-53.03" calcext:value-type="currency">
            <text:p>-53,03 €</text:p>
          </table:table-cell>
          <table:table-cell table:number-columns-repeated="58"/>
        </table:table-row>
        <table:table-row table:style-name="ro1">
          <table:table-cell table:style-name="ce18" table:number-columns-repeated="3"/>
          <table:table-cell table:style-name="ce35" office:value-type="string" calcext:value-type="string" table:number-columns-spanned="3" table:number-rows-spanned="1">
            <text:p><text:a xlink:href="#'Vos comptes'.A1" xlink:type="simple">Liste de vos comptes</text:a></text:p>
          </table:table-cell>
          <table:covered-table-cell table:style-name="ce20" office:value-type="string" calcext:value-type="string">
            <text:p><text:a xlink:href="#'Vos comptes'.A1" xlink:type="simple">Liste de vos comptes</text:a></text:p>
          </table:covered-table-cell>
          <table:covered-table-cell table:style-name="ce20" office:value-type="string" calcext:value-type="string">
            <text:p><text:a xlink:href="#'Vos comptes'.A1" xlink:type="simple">Liste de vos comptes</text:a></text:p>
          </table:covered-table-cell>
          <table:table-cell table:number-columns-repeated="58"/>
        </table:table-row>
        <table:table-row table:style-name="ro2">
          <table:table-cell table:style-name="ce14" office:value-type="string" calcext:value-type="string">
            <text:p><text:a xlink:href="#'Cpt 14252 00020144101'.A5" xlink:type="simple">Date</text:a></text:p>
          </table:table-cell>
          <table:table-cell table:style-name="ce14" office:value-type="string" calcext:value-type="string">
            <text:p><text:a xlink:href="#'Cpt 14252 00020144101'.B5" xlink:type="simple">Valeur</text:a></text:p>
          </table:table-cell>
          <table:table-cell table:style-name="ce14" office:value-type="string" calcext:value-type="string">
            <text:p><text:a xlink:href="#'Cpt 14252 00020144101'!C5" xlink:type="simple">Libellé</text:a></text:p>
          </table:table-cell>
          <table:table-cell table:style-name="ce14" office:value-type="string" calcext:value-type="string">
            <text:p><text:a xlink:href="#'Cpt 14252 00020144101'.D5" xlink:type="simple">Débit</text:a></text:p>
          </table:table-cell>
          <table:table-cell table:style-name="ce14" office:value-type="string" calcext:value-type="string">
            <text:p><text:a xlink:href="#'Cpt 14252 00020144101'.E5" xlink:type="simple">Crédit</text:a></text:p>
          </table:table-cell>
          <table:table-cell table:style-name="ce28" office:value-type="string" calcext:value-type="string">
            <text:p>Solde</text:p>
          </table:table-cell>
          <table:table-cell table:number-columns-repeated="58"/>
        </table:table-row>
        <table:table-row table:style-name="ro3">
          <table:table-cell table:number-columns-repeated="2" table:style-name="ce15" office:value-type="date" office:date-value="2020-09-18" calcext:value-type="date">
            <text:p>18/09/2020</text:p>
          </table:table-cell>
          <table:table-cell table:style-name="ce21" office:value-type="string" calcext:value-type="string">
            <text:p>RETRAIT DAB 1609 BREST CENTRE 2 BREST CENTRE 2 CARTE 01960615</text:p>
          </table:table-cell>
          <table:table-cell table:style-name="ce24" office:value-type="currency" office:currency="EUR" office:value="-30" calcext:value-type="currency">
            <text:p>-30,00 €</text:p>
          </table:table-cell>
          <table:table-cell table:style-name="ce21"/>
          <table:table-cell table:style-name="ce24" table:formula="of:=[.F3]+[.D6]+[.E6]" office:value-type="currency" office:currency="EUR" office:value="-83.03" calcext:value-type="currency">
            <text:p>-83,03 €</text:p>
          </table:table-cell>
          <table:table-cell table:number-columns-repeated="58"/>
        </table:table-row>
        <table:table-row table:style-name="ro4">
          <table:table-cell table:number-columns-repeated="2" table:style-name="ce16" office:value-type="date" office:date-value="2020-09-21" calcext:value-type="date">
            <text:p>21/09/2020</text:p>
          </table:table-cell>
          <table:table-cell table:style-name="ce22" office:value-type="string" calcext:value-type="string">
            <text:p>VIR MR DEMIRDELEN OU MLE MAR REFERENCE NON TRANSMISE PAIEMENT MIKA</text:p>
          </table:table-cell>
          <table:table-cell table:style-name="ce22"/>
          <table:table-cell table:style-name="ce25" office:value-type="currency" office:currency="EUR" office:value="150" calcext:value-type="currency">
            <text:p>150,00 €</text:p>
          </table:table-cell>
          <table:table-cell table:style-name="ce25" table:formula="of:=IF([.F6]&lt;&gt;&quot;NA&quot;;[.F6]+[.D7]+[.E7];&quot;NA&quot;)" office:value-type="currency" office:currency="EUR" office:value="66.97" calcext:value-type="currency">
            <text:p>66,97 €</text:p>
          </table:table-cell>
          <table:table-cell table:number-columns-repeated="58"/>
        </table:table-row>
        <table:table-row table:style-name="ro4">
          <table:table-cell table:number-columns-repeated="2" table:style-name="ce15" office:value-type="date" office:date-value="2020-09-21" calcext:value-type="date">
            <text:p>21/09/2020</text:p>
          </table:table-cell>
          <table:table-cell table:style-name="ce21" office:value-type="string" calcext:value-type="string">
            <text:p>PAIEMENT CB 1809 BREST PILIER LA POSTE L299220 CARTE 01960615</text:p>
          </table:table-cell>
          <table:table-cell table:style-name="ce24" office:value-type="currency" office:currency="EUR" office:value="-1.4" calcext:value-type="currency">
            <text:p>-1,40 €</text:p>
          </table:table-cell>
          <table:table-cell table:style-name="ce21"/>
          <table:table-cell table:style-name="ce24" table:formula="of:=IF([.F7]&lt;&gt;&quot;NA&quot;;[.F7]+[.D8]+[.E8];&quot;NA&quot;)" office:value-type="currency" office:currency="EUR" office:value="65.57" calcext:value-type="currency">
            <text:p>65,57 €</text:p>
          </table:table-cell>
          <table:table-cell table:number-columns-repeated="58"/>
        </table:table-row>
        <table:table-row table:style-name="ro4">
          <table:table-cell table:number-columns-repeated="2" table:style-name="ce16" office:value-type="date" office:date-value="2020-09-22" calcext:value-type="date">
            <text:p>22/09/2020</text:p>
          </table:table-cell>
          <table:table-cell table:style-name="ce22" office:value-type="string" calcext:value-type="string">
            <text:p>RETRAIT DAB 1809 BREST PILIER R LA BANQUE POSTAL CARTE 01960615</text:p>
          </table:table-cell>
          <table:table-cell table:style-name="ce25" office:value-type="currency" office:currency="EUR" office:value="-60" calcext:value-type="currency">
            <text:p>-60,00 €</text:p>
          </table:table-cell>
          <table:table-cell table:style-name="ce22"/>
          <table:table-cell table:style-name="ce25" table:formula="of:=IF([.F8]&lt;&gt;&quot;NA&quot;;[.F8]+[.D9]+[.E9];&quot;NA&quot;)" office:value-type="currency" office:currency="EUR" office:value="5.56999999999999" calcext:value-type="currency">
            <text:p>5,57 €</text:p>
          </table:table-cell>
          <table:table-cell table:number-columns-repeated="58"/>
        </table:table-row>
        <table:table-row table:style-name="ro4">
          <table:table-cell table:number-columns-repeated="2" table:style-name="ce15" office:value-type="date" office:date-value="2020-09-28" calcext:value-type="date">
            <text:p>28/09/2020</text:p>
          </table:table-cell>
          <table:table-cell table:style-name="ce21" office:value-type="string" calcext:value-type="string">
            <text:p>PRLV SEPA PAYPAL EUROPE S.A.R.L 1010478067167 PAYPAL VIREMENT 1010478067167 PAYPAL</text:p>
          </table:table-cell>
          <table:table-cell table:style-name="ce24" office:value-type="currency" office:currency="EUR" office:value="-9.99" calcext:value-type="currency">
            <text:p>-9,99 €</text:p>
          </table:table-cell>
          <table:table-cell table:style-name="ce21"/>
          <table:table-cell table:style-name="ce24" table:formula="of:=IF([.F9]&lt;&gt;&quot;NA&quot;;[.F9]+[.D10]+[.E10];&quot;NA&quot;)" office:value-type="currency" office:currency="EUR" office:value="-4.42000000000001" calcext:value-type="currency">
            <text:p>-4,42 €</text:p>
          </table:table-cell>
          <table:table-cell table:number-columns-repeated="58"/>
        </table:table-row>
        <table:table-row table:style-name="ro4">
          <table:table-cell table:number-columns-repeated="2" table:style-name="ce16" office:value-type="date" office:date-value="2020-10-01" calcext:value-type="date">
            <text:p>01/10/2020</text:p>
          </table:table-cell>
          <table:table-cell table:style-name="ce22" office:value-type="string" calcext:value-type="string">
            <text:p>PRLV SEPA PAYPAL EUROPE S.A.R.L 1010540179641 PAYPAL VIREMENT 1010540179641 PAYPAL</text:p>
          </table:table-cell>
          <table:table-cell table:style-name="ce25" office:value-type="currency" office:currency="EUR" office:value="-47.88" calcext:value-type="currency">
            <text:p>-47,88 €</text:p>
          </table:table-cell>
          <table:table-cell table:style-name="ce22"/>
          <table:table-cell table:style-name="ce25" table:formula="of:=IF([.F10]&lt;&gt;&quot;NA&quot;;[.F10]+[.D11]+[.E11];&quot;NA&quot;)" office:value-type="currency" office:currency="EUR" office:value="-52.3" calcext:value-type="currency">
            <text:p>-52,30 €</text:p>
          </table:table-cell>
          <table:table-cell table:number-columns-repeated="58"/>
        </table:table-row>
        <table:table-row table:style-name="ro4">
          <table:table-cell table:number-columns-repeated="2" table:style-name="ce15" office:value-type="date" office:date-value="2020-10-05" calcext:value-type="date">
            <text:p>05/10/2020</text:p>
          </table:table-cell>
          <table:table-cell table:style-name="ce21" office:value-type="string" calcext:value-type="string">
            <text:p>VIR POLE EMPLOI BRETAGNE 20275001545 27 360 44016683 05102020</text:p>
          </table:table-cell>
          <table:table-cell table:style-name="ce21"/>
          <table:table-cell table:style-name="ce24" office:value-type="currency" office:currency="EUR" office:value="1023.6" calcext:value-type="currency">
            <text:p>1 023,60 €</text:p>
          </table:table-cell>
          <table:table-cell table:style-name="ce24" table:formula="of:=IF([.F11]&lt;&gt;&quot;NA&quot;;[.F11]+[.D12]+[.E12];&quot;NA&quot;)" office:value-type="currency" office:currency="EUR" office:value="971.3" calcext:value-type="currency">
            <text:p>971,30 €</text:p>
          </table:table-cell>
          <table:table-cell table:number-columns-repeated="58"/>
        </table:table-row>
        <table:table-row table:style-name="ro2">
          <table:table-cell table:number-columns-repeated="2" table:style-name="ce16" office:value-type="date" office:date-value="2020-10-05" calcext:value-type="date">
            <text:p>05/10/2020</text:p>
          </table:table-cell>
          <table:table-cell table:style-name="ce22" office:value-type="string" calcext:value-type="string">
            <text:p>VIR SEPA COMPTE COMMUN - MIKA M</text:p>
          </table:table-cell>
          <table:table-cell table:style-name="ce25" office:value-type="currency" office:currency="EUR" office:value="-600" calcext:value-type="currency">
            <text:p>-600,00 €</text:p>
          </table:table-cell>
          <table:table-cell table:style-name="ce22"/>
          <table:table-cell table:style-name="ce25" table:formula="of:=IF([.F12]&lt;&gt;&quot;NA&quot;;[.F12]+[.D13]+[.E13];&quot;NA&quot;)" office:value-type="currency" office:currency="EUR" office:value="371.3" calcext:value-type="currency">
            <text:p>371,30 €</text:p>
          </table:table-cell>
          <table:table-cell table:number-columns-repeated="58"/>
        </table:table-row>
        <table:table-row table:style-name="ro2">
          <table:table-cell table:number-columns-repeated="2" table:style-name="ce15" office:value-type="date" office:date-value="2020-10-05" calcext:value-type="date">
            <text:p>05/10/2020</text:p>
          </table:table-cell>
          <table:table-cell table:style-name="ce21" office:value-type="string" calcext:value-type="string">
            <text:p>ECH PRET CAP+IN 14252 201441 03</text:p>
          </table:table-cell>
          <table:table-cell table:style-name="ce24" office:value-type="currency" office:currency="EUR" office:value="-271.62" calcext:value-type="currency">
            <text:p>-271,62 €</text:p>
          </table:table-cell>
          <table:table-cell table:style-name="ce21"/>
          <table:table-cell table:style-name="ce24" table:formula="of:=IF([.F13]&lt;&gt;&quot;NA&quot;;[.F13]+[.D14]+[.E14];&quot;NA&quot;)" office:value-type="currency" office:currency="EUR" office:value="99.6799999999999" calcext:value-type="currency">
            <text:p>99,68 €</text:p>
          </table:table-cell>
          <table:table-cell table:number-columns-repeated="58"/>
        </table:table-row>
        <table:table-row table:style-name="ro4">
          <table:table-cell table:number-columns-repeated="2" table:style-name="ce16" office:value-type="date" office:date-value="2020-10-06" calcext:value-type="date">
            <text:p>06/10/2020</text:p>
          </table:table-cell>
          <table:table-cell table:style-name="ce22" office:value-type="string" calcext:value-type="string">
            <text:p>PRLV SEPA PAYPAL EUROPE S.A.R.L 1010591196972 PAYPAL VIREMENT 1010591196972 PAYPAL</text:p>
          </table:table-cell>
          <table:table-cell table:style-name="ce25" office:value-type="currency" office:currency="EUR" office:value="-4.99" calcext:value-type="currency">
            <text:p>-4,99 €</text:p>
          </table:table-cell>
          <table:table-cell table:style-name="ce22"/>
          <table:table-cell table:style-name="ce25" table:formula="of:=IF([.F14]&lt;&gt;&quot;NA&quot;;[.F14]+[.D15]+[.E15];&quot;NA&quot;)" office:value-type="currency" office:currency="EUR" office:value="94.69" calcext:value-type="currency">
            <text:p>94,69 €</text:p>
          </table:table-cell>
          <table:table-cell table:number-columns-repeated="58"/>
        </table:table-row>
        <table:table-row table:style-name="ro2">
          <table:table-cell table:style-name="ce15" office:value-type="date" office:date-value="2020-10-06" calcext:value-type="date">
            <text:p>06/10/2020</text:p>
          </table:table-cell>
          <table:table-cell table:style-name="ce15" office:value-type="date" office:date-value="2020-10-01" calcext:value-type="date">
            <text:p>01/10/2020</text:p>
          </table:table-cell>
          <table:table-cell table:style-name="ce21" office:value-type="string" calcext:value-type="string">
            <text:p>F COTIS START J. ACTIFS</text:p>
          </table:table-cell>
          <table:table-cell table:style-name="ce24" office:value-type="currency" office:currency="EUR" office:value="-5.5" calcext:value-type="currency">
            <text:p>-5,50 €</text:p>
          </table:table-cell>
          <table:table-cell table:style-name="ce21"/>
          <table:table-cell table:style-name="ce29" table:formula="of:=IF([.F15]&lt;&gt;&quot;NA&quot;;[.F15]+[.D16]+[.E16];&quot;NA&quot;)" office:value-type="currency" office:currency="EUR" office:value="89.19" calcext:value-type="currency">
            <text:p>89,19 €</text:p>
          </table:table-cell>
          <table:table-cell table:number-columns-repeated="58"/>
        </table:table-row>
        <table:table-row table:style-name="ro2">
          <table:table-cell table:number-columns-repeated="2" table:style-name="ce16" office:value-type="date" office:date-value="2020-10-12" calcext:value-type="date">
            <text:p>12/10/2020</text:p>
          </table:table-cell>
          <table:table-cell table:style-name="ce22" office:value-type="string" calcext:value-type="string">
            <text:p>CHEQUE 3405118</text:p>
          </table:table-cell>
          <table:table-cell table:style-name="ce25" office:value-type="currency" office:currency="EUR" office:value="-24" calcext:value-type="currency">
            <text:p>-24,00 €</text:p>
          </table:table-cell>
          <table:table-cell table:style-name="ce22"/>
          <table:table-cell table:style-name="ce25" table:formula="of:=IF([.F16]&lt;&gt;&quot;NA&quot;;[.F16]+[.D17]+[.E17];&quot;NA&quot;)" office:value-type="currency" office:currency="EUR" office:value="65.19" calcext:value-type="currency">
            <text:p>65,19 €</text:p>
          </table:table-cell>
          <table:table-cell table:number-columns-repeated="58"/>
        </table:table-row>
        <table:table-row table:style-name="ro1">
          <table:table-cell table:style-name="ce17" table:number-columns-spanned="3" table:number-rows-spanned="1"/>
          <table:covered-table-cell table:number-columns-repeated="2" table:style-name="ce17"/>
          <table:table-cell table:style-name="ce41" office:value-type="string" calcext:value-type="string" table:number-columns-spanned="2" table:number-rows-spanned="1">
            <text:p>Solde au 16/10/2020 : </text:p>
          </table:table-cell>
          <table:covered-table-cell table:style-name="ce41" office:value-type="string" calcext:value-type="string">
            <text:p>Solde au 21/10/2020 : </text:p>
          </table:covered-table-cell>
          <table:table-cell table:style-name="ce27" table:formula="of:=[.F17]" office:value-type="currency" office:currency="EUR" office:value="65.19" calcext:value-type="currency">
            <text:p>65,19 €</text:p>
          </table:table-cell>
          <table:table-cell table:number-columns-repeated="58"/>
        </table:table-row>
        <table:table-row table:style-name="ro1">
          <table:table-cell table:style-name="Default" table:number-columns-repeated="6"/>
          <table:table-cell table:number-columns-repeated="58"/>
        </table:table-row>
        <table:table-row table:style-name="ro1">
          <table:table-cell table:style-name="ce34" table:number-columns-spanned="3" table:number-rows-spanned="1"/>
          <table:covered-table-cell table:number-columns-repeated="2" table:style-name="ce34"/>
          <table:table-cell table:style-name="ce44" table:number-columns-spanned="2" table:number-rows-spanned="1"/>
          <table:covered-table-cell table:style-name="ce44"/>
          <table:table-cell table:style-name="ce30"/>
          <table:table-cell table:number-columns-repeated="58"/>
        </table:table-row>
        <table:table-row table:style-name="ro1" table:number-rows-repeated="10">
          <table:table-cell table:style-name="Default" table:number-columns-repeated="6"/>
          <table:table-cell table:number-columns-repeated="58"/>
        </table:table-row>
        <table:table-row table:style-name="ro1">
          <table:table-cell table:style-name="ce35" office:value-type="string" calcext:value-type="string" table:number-columns-spanned="6" table:number-rows-spanned="1">
            <text:p><text:a xlink:href="#'Vos comptes'.A1" xlink:type="simple">Liste de vos comptes</text:a></text:p>
          </table:table-cell>
          <table:covered-table-cell table:style-name="ce20" office:value-type="string" calcext:value-type="string">
            <text:p><text:a xlink:href="#'Vos comptes'.A1" xlink:type="simple">Liste de vos comptes</text:a></text:p>
          </table:covered-table-cell>
          <table:covered-table-cell table:style-name="ce20" office:value-type="string" calcext:value-type="string">
            <text:p><text:a xlink:href="#'Vos comptes'.A1" xlink:type="simple">Liste de vos comptes</text:a></text:p>
          </table:covered-table-cell>
          <table:covered-table-cell table:style-name="ce20" office:value-type="string" calcext:value-type="string">
            <text:p><text:a xlink:href="#'Vos comptes'.A1" xlink:type="simple">Liste de vos comptes</text:a></text:p>
          </table:covered-table-cell>
          <table:covered-table-cell table:style-name="ce20" office:value-type="string" calcext:value-type="string">
            <text:p><text:a xlink:href="#'Vos comptes'.A1" xlink:type="simple">Liste de vos comptes</text:a></text:p>
          </table:covered-table-cell>
          <table:covered-table-cell table:style-name="ce20"/>
          <table:table-cell table:number-columns-repeated="58"/>
        </table:table-row>
        <table:table-row table:style-name="ro1" table:number-rows-repeated="1048544">
          <table:table-cell table:number-columns-repeated="64"/>
        </table:table-row>
        <table:table-row table:style-name="ro1">
          <table:table-cell table:number-columns-repeated="64"/>
        </table:table-row>
        <table:named-expressions>
          <table:named-range table:name="_xlnm.Print_Area" table:base-cell-address="" table:cell-range-address="$'Cpt 14252 00020144101'.$A$1:.$F$31" table:range-usable-as="print-range"/>
        </table:named-expressions>
      </table:table>
      <table:table table:name="hidden" table:style-name="ta2">
        <table:table-column table:style-name="co5" table:default-cell-style-name="Default"/>
        <table:table-column table:style-name="co6" table:default-cell-style-name="Default"/>
        <table:table-column table:style-name="co7" table:default-cell-style-name="Default"/>
        <table:table-column table:style-name="co4" table:number-columns-repeated="61" table:default-cell-style-name="Default"/>
        <table:table-row table:style-name="ro1">
          <table:table-cell table:style-name="ce31" office:value-type="string" calcext:value-type="string">
            <text:p>Nombre de compte</text:p>
          </table:table-cell>
          <table:table-cell table:number-columns-repeated="63"/>
        </table:table-row>
        <table:table-row table:style-name="ro1">
          <table:table-cell table:style-name="ce32" office:value-type="string" calcext:value-type="string">
            <text:p>2</text:p>
          </table:table-cell>
          <table:table-cell table:number-columns-repeated="63"/>
        </table:table-row>
        <table:table-row table:style-name="ro1">
          <table:table-cell table:style-name="ce31" office:value-type="string" calcext:value-type="string">
            <text:p>Nom du compte</text:p>
          </table:table-cell>
          <table:table-cell table:style-name="ce31" office:value-type="string" calcext:value-type="string">
            <text:p>Range </text:p>
          </table:table-cell>
          <table:table-cell table:style-name="ce31" office:value-type="string" calcext:value-type="string">
            <text:p>Type</text:p>
          </table:table-cell>
          <table:table-cell table:number-columns-repeated="61"/>
        </table:table-row>
        <table:table-row table:style-name="ro1">
          <table:table-cell table:style-name="ce32" office:value-type="string" calcext:value-type="string">
            <text:p>Cpt 14252 00020144101</text:p>
          </table:table-cell>
          <table:table-cell table:style-name="ce32" office:value-type="string" calcext:value-type="string">
            <text:p>A6:E28</text:p>
          </table:table-cell>
          <table:table-cell table:style-name="ce32" office:value-type="string" calcext:value-type="string">
            <text:p>cpt</text:p>
          </table:table-cell>
          <table:table-cell table:number-columns-repeated="61"/>
        </table:table-row>
        <table:table-row table:style-name="ro1" table:number-rows-repeated="1048571">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number:currency-style style:name="N145">
      <number:number number:decimal-places="2" loext:min-decimal-places="2" number:min-integer-digits="1" number:grouping="true"/>
      <number:text> </number:text>
      <number:currency-symbol number:language="ar">€</number:currency-symbol>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lob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262626" style:text-outline="false" style:text-line-through-style="none" style:text-line-through-type="none" style:font-name="Verdana" fo:font-family="Verdana"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Header"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262626" style:text-outline="false" style:text-line-through-style="none" style:text-line-through-type="none" style:font-name="Verdana" fo:font-family="Verdana"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HyperLink_20_1" style:display-name="HyperLink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4170a9" style:text-outline="false" style:text-line-through-style="none" style:text-line-through-type="none" style:font-name="Verdana" fo:font-family="Verdana"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ableHeader" style:family="table-cell" style:parent-style-name="Default" style:data-style-name="N0">
      <style:table-cell-properties fo:background-color="#4173a9" style:cell-protect="protected" style:print-content="true" style:diagonal-bl-tr="none" style:diagonal-tl-br="none" style:text-align-source="fix" style:repeat-content="false" fo:wrap-option="no-wrap" fo:border="0.74pt solid #666666"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Verdana" fo:font-family="Verdana"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loext: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2.499cm" fo:margin-bottom="2.499cm" fo:margin-left="1.9cm" fo:margin-right="1.9cm" style:print-page-order="ttb" style:first-page-number="continue" loext: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3">00/00/0000</text:date>, <text:time style:data-style-name="N2" text:time-value="11:51:39.85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Cpt_20_14252_20_00020144101" style:display-name="PageStyle_Cpt 14252 00020144101" style:page-layout-name="Mpm3">
      <style:header style:display="false"/>
      <style:header-left style:display="false"/>
      <style:footer style:display="false"/>
      <style:footer-left style:display="false"/>
    </style:master-page>
    <style:master-page style:name="PageStyle_5f_Vos_20_comptes" style:display-name="PageStyle_Vos comptes" style:page-layout-name="Mpm4">
      <style:header style:display="false"/>
      <style:header-left style:display="false"/>
      <style:footer style:display="false"/>
      <style:footer-left style:display="false"/>
    </style:master-page>
    <style:master-page style:name="PageStyle_5f_hidden" style:display-name="PageStyle_hidde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1-30T15:07:59</meta:creation-date>
    <dc:date>2020-11-03T11:51:53.108000000</dc:date>
    <meta:generator>LibreOffice/6.4.4.2$Windows_X86_64 LibreOffice_project/3d775be2011f3886db32dfd395a6a6d1ca2630ff</meta:generator>
    <meta:editing-duration>PT23M43S</meta:editing-duration>
    <meta:editing-cycles>3</meta:editing-cycles>
    <meta:document-statistic meta:table-count="2" meta:cell-count="100"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FormulaModule.xml><?xml version="1.0" encoding="utf-8"?>
<!DOCTYPE module  PUBLIC '-//OpenOffice.org//DTD OfficeDocument 1.0//EN'  'module.dtd'>
<script:module xmlns:script="http://openoffice.org/2000/script" script:name="FormulaModule" script:language="StarBasic" script:moduleType="normal">Rem Attribute VBA_ModuleType=VBAModule
Option VBASupport 1
Option Explicit

Private Formula As Dictionary

Private Function GetFormulaDict() As Dictionary

    If Formula Is Nothing Then
        Set Formula = New Dictionary
    End If

    Set GetFormulaDict = Formula

End Function


Public Function GetFormula(WorksheetName As String) As String
    
    If GetFormulaDict.Exists(WorksheetName) Then
        GetFormula = GetFormulaDict.Item(WorksheetName)
    Else
        GetFormula = ""
    End If

End Function

Public Sub SetFormula(WorksheetName As String, Formula As String)

    If GetFormulaDict.Exists(WorksheetName) Then
        GetFormulaDict.Remove (WorksheetName)
    End If
    
    GetFormulaDict.Add WorksheetName, Formula

End Sub


</script:module>
</file>

<file path=Basic/VBAProject/LastClickModule.xml><?xml version="1.0" encoding="utf-8"?>
<!DOCTYPE module  PUBLIC '-//OpenOffice.org//DTD OfficeDocument 1.0//EN'  'module.dtd'>
<script:module xmlns:script="http://openoffice.org/2000/script" script:name="LastClickModule" script:language="StarBasic" script:moduleType="normal">Rem Attribute VBA_ModuleType=VBAModule
Option VBASupport 1
Option Explicit

Private lastClick As Dictionary

Private Function GetLastClickDict() As Dictionary

    If lastClick Is Nothing Then
        Set lastClick = New Dictionary
    End If

    Set GetLastClickDict = lastClick

End Function


Public Function LastClickedCell(WorksheetName As String) As String
    
    If GetLastClickDict.Exists(WorksheetName) Then
        LastClickedCell = GetLastClickDict.Item(WorksheetName)
    Else
        LastClickedCell = ""
    End If

End Function

Public Sub SetClickedCell(WorksheetName As String, ClickedCell As String)

    If GetLastClickDict.Exists(WorksheetName) Then
        GetLastClickDict.Remove (WorksheetName)
    End If
    
    GetLastClickDict.Add WorksheetName, ClickedCell

End Sub

</script:module>
</file>

<file path=Basic/VBAProject/OrderingModule.xml><?xml version="1.0" encoding="utf-8"?>
<!DOCTYPE module  PUBLIC '-//OpenOffice.org//DTD OfficeDocument 1.0//EN'  'module.dtd'>
<script:module xmlns:script="http://openoffice.org/2000/script" script:name="OrderingModule" script:language="StarBasic" script:moduleType="normal">Rem Attribute VBA_ModuleType=VBAModule
Option VBASupport 1
Option Explicit

Private ordering As Dictionary

Private Function GetOrderingDict() As Dictionary

    If ordering Is Nothing Then
        Set ordering = New Dictionary
    End If

    Set GetOrderingDict = ordering

End Function

Public Function IsDescending(WorksheetName As String) As Boolean

    If GetOrderingDict.Exists(WorksheetName) And GetOrderingDict.Item(WorksheetName) = "desc" Then
        IsDescending = True
    Else
        IsDescending = False
    End If

End Function

Public Sub SetDescending(WorksheetName As String)

    If GetOrderingDict.Exists(WorksheetName) Then
        GetOrderingDict.Remove (WorksheetName)
    End If
    
    GetOrderingDict.Add WorksheetName, "desc"

End Sub

Public Sub SetAscending(WorksheetName As String)

    If GetOrderingDict.Exists(WorksheetName) Then
        GetOrderingDict.Remove (WorksheetName)
    End If
    
    GetOrderingDict.Add WorksheetName, "asc"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Option Explicit

Private Sub Workbook_SheetFollowHyperlink(ByVal Sh As Object, ByVal Target As Hyperlink)
    Dim pos, cellule
    
    pos = InStr(Target.SubAddress, "!")
    If (pos &gt; 0) Then
        cellule = Mid(Target.SubAddress, pos + 1, Len(Target.SubAddress) - pos)
        If (cellule &lt;&gt; "A1") Then
            
            Dim t As String
            Dim range As String
            
            t = GetAcccountType(Sh.Name)
            
            If (t = "cpt") Then
                SortCpt Sh.Name, cellule
            ElseIf (t = "cpt_1col") Then
                SortCpt1Col Sh.Name, cellule
            ElseIf (t = "cb") Then
                SortCb Sh.Name, cellule
            End If
        End If
    End If
    
End Sub

Public Function GetRange(WorksheetName As String) As String
    Dim count As Integer
        
    count = Worksheets("hidden").Cells(2, 1).Value
    
    Dim i As Integer
    For i = 3 To count + 2
        If Worksheets("hidden").Cells(i, 1).Value = WorksheetName Then
            GetRange = Worksheets("hidden").Cells(i, 2).Value
            Exit For
        End If
    Next
End Function

Private Function GetAcccountType(ByVal WorksheetName As String) As String
    Dim count As Integer
        
    count = Worksheets("hidden").Cells(2, 1).Value
    
    Dim i As Integer
    For i = 3 To count + 2
        If Worksheets("hidden").Cells(i, 1).Value = WorksheetName Then
            GetAcccountType = Worksheets("hidden").Cells(i, 3).Value
            Exit For
        End If
    Next
End Function


Private Sub SortCpt(ByVal WorksheetName As String, ByVal ClickedCell As String)
    If FormulaModule.GetFormula(WorksheetName) = "" Then
        FormulaModule.SetFormula WorksheetName, Worksheets(WorksheetName).Cells(6, 6).Formula
    End If
    
    Dim k1, k2, k3, colClic, lastClick, modeTri
    Dim IsDescending As Boolean
    
    lastClick = LastClickModule.LastClickedCell(WorksheetName)
    IsDescending = OrderingModule.IsDescending(WorksheetName)
    
    k1 = "A6"
    k2 = "B6"
    k3 = "C6"
            
    If (lastClick = ClickedCell) Then
        If IsDescending Then
            OrderingModule.SetAscending (WorksheetName)
        Else
            OrderingModule.SetDescending (WorksheetName)
        End If
        IsDescending = Not IsDescending
    Else
        OrderingModule.SetAscending (WorksheetName)
        IsDescending = False
    End If
    
    LastClickModule.SetClickedCell WorksheetName, ClickedCell
    If (IsDescending) Then
        modeTri = xlDescending
    Else
        modeTri = xlAscending
    End If
    
    If (ClickedCell = "B5") Then
        k1 = "B6": k2 = "A6": k3 = "C6"
    ElseIf (ClickedCell = "C5") Then
        k1 = "C6": k2 = "A6": k3 = "B6"
    ElseIf (ClickedCell = "D5") Then
        k1 = "D6": k2 = "A6": k3 = "B6"
    ElseIf (ClickedCell = "E5") Then
        k1 = "E6": k2 = "A6": k3 = "B6"
    End If
    
    
    Worksheets(WorksheetName).range(GetRange(WorksheetName)).Sort Key1:=range(k1), Order1:=modeTri, Key2:=range(k2), Order2:=modeTri, Key3:=range(k3), Order3:=modeTri, Header:=xlGuess, OrderCustom:=1, MatchCase:=False, Orientation:=xlTopToBottom
    
    If (IsDescending Or Asc(Left(ClickedCell, 1)) - 65 &gt; 1) Then
        Worksheets(WorksheetName).Cells(6, 6).Formula = "NA"
    Else
        Worksheets(WorksheetName).Cells(6, 6).Formula = FormulaModule.GetFormula(WorksheetName)
    End If
        
End Sub

Private Sub SortCpt1Col(ByVal WorksheetName As String, ByVal ClickedCell As String)
    If FormulaModule.GetFormula(WorksheetName) = "" Then
        FormulaModule.SetFormula WorksheetName, Worksheets(WorksheetName).Cells(6, 5).Formula
    End If
    
    Dim k1, k2, k3, colClic, lastClick, modeTri
    Dim IsDescending As Boolean
    
    lastClick = LastClickModule.LastClickedCell(WorksheetName)
    IsDescending = OrderingModule.IsDescending(WorksheetName)
    
    k1 = "A6"
    k2 = "B6"
    k3 = "C6"
            
    If (lastClick = ClickedCell) Then
        If IsDescending Then
            OrderingModule.SetAscending (WorksheetName)
        Else
            OrderingModule.SetDescending (WorksheetName)
        End If
        IsDescending = Not IsDescending
    Else
        OrderingModule.SetAscending (WorksheetName)
        IsDescending = False
    End If
    
    LastClickModule.SetClickedCell WorksheetName, ClickedCell
    If (IsDescending) Then
        modeTri = xlDescending
    Else
        modeTri = xlAscending
    End If
    
    If (ClickedCell = "B5") Then
        k1 = "B6": k2 = "A6": k3 = "C6"
    ElseIf (ClickedCell = "C5") Then
        k1 = "C6": k2 = "A6": k3 = "B6"
    ElseIf (ClickedCell = "D5") Then
        k1 = "D6": k2 = "A6": k3 = "B6"
    End If
     
    Worksheets(WorksheetName).range(GetRange(WorksheetName)).Sort Key1:=range(k1), Order1:=modeTri, Key2:=range(k2), Order2:=modeTri, Key3:=range(k3), Order3:=modeTri, Header:=xlGuess, OrderCustom:=1, MatchCase:=False, Orientation:=xlTopToBottom
    
    If (IsDescending Or Asc(Left(ClickedCell, 1)) - 65 &gt; 0) Then
        Worksheets(WorksheetName).Cells(6, 5).Formula = "NA"
    Else
        Worksheets(WorksheetName).Cells(6, 5).Formula = FormulaModule.GetFormula(WorksheetName)
    End If
End Sub

Private Sub SortCb(ByVal WorksheetName As String, ByVal ClickedCell As String)
    Dim k1, k2, k3, colClic, lastClick, modeTri
    Dim IsDescending As Boolean
    
    lastClick = LastClickModule.LastClickedCell(WorksheetName)
    IsDescending = OrderingModule.IsDescending(WorksheetName)
    
    k1 = "A6"
    k2 = "B6"
    k3 = "C6"
    
    If (lastClick = ClickedCell) Then
        If IsDescending Then
            OrderingModule.SetAscending (WorksheetName)
        Else
            OrderingModule.SetDescending (WorksheetName)
        End If
        IsDescending = Not IsDescending
    Else
        OrderingModule.SetAscending (WorksheetName)
        IsDescending = False
    End If
        
    LastClickModule.SetClickedCell WorksheetName, ClickedCell
    If (IsDescending) Then
        modeTri = xlDescending
    Else
        modeTri = xlAscending
    End If
        
    If (ClickedCell = "B5") Then
        k1 = "B6": k2 = "A6": k3 = "C6"
    ElseIf (ClickedCell = "C5") Then
        k1 = "C6": k2 = "A6": k3 = "B6"
    End If
        
    Dim r As Variant
    For Each r In Split(GetRange(WorksheetName), "|")
        Worksheets(WorksheetName).range(r).Sort Key1:=range(k1), Order1:=modeTri, Key2:=range(k2), Order2:=modeTri, Key3:=range(k3), Order3:=modeTri, Header:=xlGuess, OrderCustom:=1, MatchCase:=False, Orientation:=xlTopToBottom
    Next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FormulaModule"/>
  <library:element library:name="LastClickModule"/>
  <library:element library:name="OrderingModule"/>
  <library:element library:name="Sheet1"/>
  <library:element library:name="Sheet2"/>
  <library:element library:name="Sheet3"/>
  <library:element library:name="Sheet4"/>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