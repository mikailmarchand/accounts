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1.718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1.591cm"/>
    </style:style>
    <style:style style:name="co13" style:family="table-column">
      <style:table-column-properties fo:break-before="auto" style:column-width="1.473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57cm"/>
    </style:style>
    <style:style style:name="co17" style:family="table-column">
      <style:table-column-properties fo:break-before="auto" style:column-width="1.953cm"/>
    </style:style>
    <style:style style:name="co18" style:family="table-column">
      <style:table-column-properties fo:break-before="auto" style:column-width="2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1" table:visibility="collapse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" table:number-columns-repeated="994" table:default-cell-style-name="ce1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Abo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zenor</text:p>
          </table:table-cell>
          <table:table-cell office:value-type="string" calcext:value-type="string">
            <text:p>Banque</text:p>
          </table:table-cell>
          <table:table-cell office:value-type="string" calcext:value-type="string">
            <text:p>Bouffe</text:p>
          </table:table-cell>
          <table:table-cell office:value-type="string" calcext:value-type="string">
            <text:p>Cadeau</text:p>
          </table:table-cell>
          <table:table-cell office:value-type="string" calcext:value-type="string">
            <text:p>CFPPA</text:p>
          </table:table-cell>
          <table:table-cell office:value-type="string" calcext:value-type="string">
            <text:p>Coiffeu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Ecos</text:p>
          </table:table-cell>
          <table:table-cell office:value-type="string" calcext:value-type="string">
            <text:p>EVL</text:p>
          </table:table-cell>
          <table:table-cell table:style-name="ce5" office:value-type="string" calcext:value-type="string">
            <text:p>Emmén.</text:p>
          </table:table-cell>
          <table:table-cell table:style-name="ce5" office:value-type="string" calcext:value-type="string">
            <text:p>Fastfood</text:p>
          </table:table-cell>
          <table:table-cell office:value-type="string" calcext:value-type="string">
            <text:p>Impôts</text:p>
          </table:table-cell>
          <table:table-cell office:value-type="string" calcext:value-type="string">
            <text:p>Loyer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tériel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Salair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Vacances</text:p>
          </table:table-cell>
          <table:table-cell office:value-type="string" calcext:value-type="string">
            <text:p>Vêtement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pt21</text:p>
          </table:table-cell>
          <table:table-cell office:value-type="float" office:value="-1603.89" calcext:value-type="float">
            <text:p>-1603,89</text:p>
          </table:table-cell>
          <table:table-cell office:value-type="float" office:value="-22.97" calcext:value-type="float">
            <text:p>-22,97</text:p>
          </table:table-cell>
          <table:table-cell table:formula="of:=-51.93+700-698.6" office:value-type="float" office:value="-50.53" calcext:value-type="float">
            <text:p>-50,53</text:p>
          </table:table-cell>
          <table:table-cell office:value-type="float" office:value="0" calcext:value-type="float">
            <text:p>0</text:p>
          </table:table-cell>
          <table:table-cell table:formula="of:=-12.2-271.61" office:value-type="float" office:value="-283.81" calcext:value-type="float">
            <text:p>-283,81</text:p>
          </table:table-cell>
          <table:table-cell office:value-type="float" office:value="-617.34" calcext:value-type="float">
            <text:p>-617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3.1" calcext:value-type="float">
            <text:p>-253,1</text:p>
          </table:table-cell>
          <table:table-cell office:value-type="float" office:value="-30" calcext:value-type="float">
            <text:p>-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71.2" calcext:value-type="float">
            <text:p>-97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1" calcext:value-type="float">
            <text:p>-1261</text:p>
          </table:table-cell>
          <table:table-cell office:value-type="float" office:value="23.56" calcext:value-type="float">
            <text:p>23,56</text:p>
          </table:table-cell>
          <table:table-cell office:value-type="float" office:value="-984.29" calcext:value-type="float">
            <text:p>-984,29</text:p>
          </table:table-cell>
          <table:table-cell office:value-type="float" office:value="-338" calcext:value-type="float">
            <text:p>-338</text:p>
          </table:table-cell>
          <table:table-cell office:value-type="float" office:value="3380.56" calcext:value-type="float">
            <text:p>3380,56</text:p>
          </table:table-cell>
          <table:table-cell office:value-type="float" office:value="-50.05" calcext:value-type="float">
            <text:p>-50,05</text:p>
          </table:table-cell>
          <table:table-cell office:value-type="float" office:value="0" calcext:value-type="float">
            <text:p>0</text:p>
          </table:table-cell>
          <table:table-cell office:value-type="float" office:value="-85.6" calcext:value-type="float">
            <text:p>-85,6</text:p>
          </table:table-cell>
          <table:table-cell office:value-type="float" office:value="0" calcext:value-type="float">
            <text:p>0</text:p>
          </table:table-cell>
          <table:table-cell office:value-type="float" office:value="-281.95" calcext:value-type="float">
            <text:p>-281,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1</text:p>
          </table:table-cell>
          <table:table-cell office:value-type="float" office:value="231.43" calcext:value-type="float">
            <text:p>231,43</text:p>
          </table:table-cell>
          <table:table-cell office:value-type="float" office:value="-75.28" calcext:value-type="float">
            <text:p>-75,28</text:p>
          </table:table-cell>
          <table:table-cell table:formula="of:=100-199.3" office:value-type="float" office:value="-99.3" calcext:value-type="float">
            <text:p>-99,3</text:p>
          </table:table-cell>
          <table:table-cell office:value-type="float" office:value="0" calcext:value-type="float">
            <text:p>0</text:p>
          </table:table-cell>
          <table:table-cell table:formula="of:=-40.4-271.61" office:value-type="float" office:value="-312.01" calcext:value-type="float">
            <text:p>-312,01</text:p>
          </table:table-cell>
          <table:table-cell office:value-type="float" office:value="-614.63" calcext:value-type="float">
            <text:p>-614,63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6.98" calcext:value-type="float">
            <text:p>-576,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1.98" calcext:value-type="float">
            <text:p>-41,98</text:p>
          </table:table-cell>
          <table:table-cell office:value-type="float" office:value="-316.9" calcext:value-type="float">
            <text:p>-316,9</text:p>
          </table:table-cell>
          <table:table-cell office:value-type="float" office:value="-341.26" calcext:value-type="float">
            <text:p>-341,26</text:p>
          </table:table-cell>
          <table:table-cell office:value-type="float" office:value="3423.86" calcext:value-type="float">
            <text:p>3423,86</text:p>
          </table:table-cell>
          <table:table-cell office:value-type="float" office:value="-68.08" calcext:value-type="float">
            <text:p>-68,08</text:p>
          </table:table-cell>
          <table:table-cell office:value-type="float" office:value="0" calcext:value-type="float">
            <text:p>0</text:p>
          </table:table-cell>
          <table:table-cell office:value-type="float" office:value="-157.65" calcext:value-type="float">
            <text:p>-157,65</text:p>
          </table:table-cell>
          <table:table-cell office:value-type="float" office:value="0" calcext:value-type="float">
            <text:p>0</text:p>
          </table:table-cell>
          <table:table-cell office:value-type="float" office:value="-428.36" calcext:value-type="float">
            <text:p>-428,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1</text:p>
          </table:table-cell>
          <table:table-cell office:value-type="float" office:value="777.15" calcext:value-type="float">
            <text:p>777,15</text:p>
          </table:table-cell>
          <table:table-cell office:value-type="float" office:value="-118.95" calcext:value-type="float">
            <text:p>-118,9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283.12" calcext:value-type="float">
            <text:p>-283,12</text:p>
          </table:table-cell>
          <table:table-cell office:value-type="float" office:value="-605.3" calcext:value-type="float">
            <text:p>-605,3</text:p>
          </table:table-cell>
          <table:table-cell office:value-type="float" office:value="-170.16" calcext:value-type="float">
            <text:p>-17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5.11" calcext:value-type="float">
            <text:p>-405,11</text:p>
          </table:table-cell>
          <table:table-cell office:value-type="float" office:value="-40" calcext:value-type="float">
            <text:p>-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300" calcext:value-type="float">
            <text:p>-1300</text:p>
          </table:table-cell>
          <table:table-cell office:value-type="float" office:value="-23.62" calcext:value-type="float">
            <text:p>-23,62</text:p>
          </table:table-cell>
          <table:table-cell office:value-type="float" office:value="-186.51" calcext:value-type="float">
            <text:p>-186,51</text:p>
          </table:table-cell>
          <table:table-cell office:value-type="float" office:value="-300.1" calcext:value-type="float">
            <text:p>-300,1</text:p>
          </table:table-cell>
          <table:table-cell office:value-type="float" office:value="3704.6" calcext:value-type="float">
            <text:p>3704,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07.1" calcext:value-type="float">
            <text:p>-107,1</text:p>
          </table:table-cell>
          <table:table-cell office:value-type="float" office:value="0" calcext:value-type="float">
            <text:p>0</text:p>
          </table:table-cell>
          <table:table-cell office:value-type="float" office:value="-401.48" calcext:value-type="float">
            <text:p>-401,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1</text:p>
          </table:table-cell>
          <table:table-cell office:value-type="float" office:value="418.98" calcext:value-type="float">
            <text:p>418,98</text:p>
          </table:table-cell>
          <table:table-cell office:value-type="float" office:value="-85.45" calcext:value-type="float">
            <text:p>-85,45</text:p>
          </table:table-cell>
          <table:table-cell office:value-type="float" office:value="-40" calcext:value-type="float">
            <text:p>-40</text:p>
          </table:table-cell>
          <table:table-cell office:value-type="float" office:value="-63.46" calcext:value-type="float">
            <text:p>-63,46</text:p>
          </table:table-cell>
          <table:table-cell office:value-type="float" office:value="-325.11" calcext:value-type="float">
            <text:p>-325,11</text:p>
          </table:table-cell>
          <table:table-cell office:value-type="float" office:value="-384.53" calcext:value-type="float">
            <text:p>-384,53</text:p>
          </table:table-cell>
          <table:table-cell office:value-type="float" office:value="-131.84" calcext:value-type="float">
            <text:p>-131,84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83.31" calcext:value-type="float">
            <text:p>-83,31</text:p>
          </table:table-cell>
          <table:table-cell office:value-type="float" office:value="-40" calcext:value-type="float">
            <text:p>-40</text:p>
          </table:table-cell>
          <table:table-cell office:value-type="float" office:value="-7" calcext:value-type="float">
            <text:p>-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7" calcext:value-type="float">
            <text:p>-577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645.41" calcext:value-type="float">
            <text:p>-645,41</text:p>
          </table:table-cell>
          <table:table-cell office:value-type="float" office:value="-213.85" calcext:value-type="float">
            <text:p>-213,85</text:p>
          </table:table-cell>
          <table:table-cell office:value-type="float" office:value="4295.72" calcext:value-type="float">
            <text:p>4295,72</text:p>
          </table:table-cell>
          <table:table-cell office:value-type="float" office:value="-44.35" calcext:value-type="float">
            <text:p>-44,35</text:p>
          </table:table-cell>
          <table:table-cell office:value-type="float" office:value="0" calcext:value-type="float">
            <text:p>0</text:p>
          </table:table-cell>
          <table:table-cell office:value-type="float" office:value="-44.4" calcext:value-type="float">
            <text:p>-44,4</text:p>
          </table:table-cell>
          <table:table-cell office:value-type="float" office:value="0" calcext:value-type="float">
            <text:p>0</text:p>
          </table:table-cell>
          <table:table-cell office:value-type="float" office:value="-490.54" calcext:value-type="float">
            <text:p>-490,54</text:p>
          </table:table-cell>
          <table:table-cell office:value-type="float" office:value="0" calcext:value-type="float">
            <text:p>0</text:p>
          </table:table-cell>
          <table:table-cell office:value-type="float" office:value="-17.49" calcext:value-type="float">
            <text:p>-17,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2</text:p>
          </table:table-cell>
          <table:table-cell office:value-type="float" office:value="-206.93" calcext:value-type="float">
            <text:p>-206,93</text:p>
          </table:table-cell>
          <table:table-cell office:value-type="float" office:value="-132.97" calcext:value-type="float">
            <text:p>-132,97</text:p>
          </table:table-cell>
          <table:table-cell office:value-type="float" office:value="-111" calcext:value-type="float">
            <text:p>-111</text:p>
          </table:table-cell>
          <table:table-cell office:value-type="float" office:value="-131.4" calcext:value-type="float">
            <text:p>-131,4</text:p>
          </table:table-cell>
          <table:table-cell office:value-type="float" office:value="-269.97" calcext:value-type="float">
            <text:p>-269,97</text:p>
          </table:table-cell>
          <table:table-cell office:value-type="float" office:value="-722.48" calcext:value-type="float">
            <text:p>-722,4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.91" calcext:value-type="float">
            <text:p>-223,91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22.92" calcext:value-type="float">
            <text:p>-22,92</text:p>
          </table:table-cell>
          <table:table-cell office:value-type="float" office:value="-228.04" calcext:value-type="float">
            <text:p>-228,04</text:p>
          </table:table-cell>
          <table:table-cell office:value-type="float" office:value="-69.5" calcext:value-type="float">
            <text:p>-69,5</text:p>
          </table:table-cell>
          <table:table-cell office:value-type="float" office:value="3236.84" calcext:value-type="float">
            <text:p>3236,84</text:p>
          </table:table-cell>
          <table:table-cell office:value-type="float" office:value="-0.99" calcext:value-type="float">
            <text:p>-0,99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-29.15" calcext:value-type="float">
            <text:p>-29,15</text:p>
          </table:table-cell>
          <table:table-cell office:value-type="float" office:value="-517.87" calcext:value-type="float">
            <text:p>-517,87</text:p>
          </table:table-cell>
          <table:table-cell office:value-type="float" office:value="0" calcext:value-type="float">
            <text:p>0</text:p>
          </table:table-cell>
          <table:table-cell office:value-type="float" office:value="-236.57" calcext:value-type="float">
            <text:p>-236,5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2</text:p>
          </table:table-cell>
          <table:table-cell office:value-type="float" office:value="976.66" calcext:value-type="float">
            <text:p>976,66</text:p>
          </table:table-cell>
          <table:table-cell office:value-type="float" office:value="-35.96" calcext:value-type="float">
            <text:p>-35,96</text:p>
          </table:table-cell>
          <table:table-cell office:value-type="float" office:value="0" calcext:value-type="float">
            <text:p>0</text:p>
          </table:table-cell>
          <table:table-cell office:value-type="float" office:value="-29.75" calcext:value-type="float">
            <text:p>-29,75</text:p>
          </table:table-cell>
          <table:table-cell office:value-type="float" office:value="-243.87" calcext:value-type="float">
            <text:p>-243,87</text:p>
          </table:table-cell>
          <table:table-cell office:value-type="float" office:value="-444.07" calcext:value-type="float">
            <text:p>-444,07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17" calcext:value-type="float">
            <text:p>-71,17</text:p>
          </table:table-cell>
          <table:table-cell office:value-type="float" office:value="0" calcext:value-type="float">
            <text:p>0</text:p>
          </table:table-cell>
          <table:table-cell office:value-type="float" office:value="-7.99" calcext:value-type="float">
            <text:p>-7,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36" calcext:value-type="float">
            <text:p>-736</text:p>
          </table:table-cell>
          <table:table-cell office:value-type="float" office:value="-134.96" calcext:value-type="float">
            <text:p>-134,96</text:p>
          </table:table-cell>
          <table:table-cell office:value-type="float" office:value="-36.95" calcext:value-type="float">
            <text:p>-36,95</text:p>
          </table:table-cell>
          <table:table-cell office:value-type="float" office:value="-292.95" calcext:value-type="float">
            <text:p>-292,95</text:p>
          </table:table-cell>
          <table:table-cell office:value-type="float" office:value="3475.03" calcext:value-type="float">
            <text:p>3475,03</text:p>
          </table:table-cell>
          <table:table-cell office:value-type="float" office:value="-67.5" calcext:value-type="float">
            <text:p>-67,5</text:p>
          </table:table-cell>
          <table:table-cell office:value-type="float" office:value="0" calcext:value-type="float">
            <text:p>0</text:p>
          </table:table-cell>
          <table:table-cell office:value-type="float" office:value="-31.8" calcext:value-type="float">
            <text:p>-31,8</text:p>
          </table:table-cell>
          <table:table-cell office:value-type="float" office:value="0" calcext:value-type="float">
            <text:p>0</text:p>
          </table:table-cell>
          <table:table-cell office:value-type="float" office:value="-350.4" calcext:value-type="float">
            <text:p>-35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22</text:p>
          </table:table-cell>
          <table:table-cell office:value-type="float" office:value="-1197.47" calcext:value-type="float">
            <text:p>-1197,47</text:p>
          </table:table-cell>
          <table:table-cell office:value-type="float" office:value="-170.97" calcext:value-type="float">
            <text:p>-170,97</text:p>
          </table:table-cell>
          <table:table-cell office:value-type="float" office:value="-24.9" calcext:value-type="float">
            <text:p>-24,9</text:p>
          </table:table-cell>
          <table:table-cell office:value-type="float" office:value="-105.93" calcext:value-type="float">
            <text:p>-105,93</text:p>
          </table:table-cell>
          <table:table-cell office:value-type="float" office:value="-243.87" calcext:value-type="float">
            <text:p>-243,87</text:p>
          </table:table-cell>
          <table:table-cell office:value-type="float" office:value="-580.59" calcext:value-type="float">
            <text:p>-580,59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52.24" calcext:value-type="float">
            <text:p>-152,24</text:p>
          </table:table-cell>
          <table:table-cell office:value-type="float" office:value="-699.33" calcext:value-type="float">
            <text:p>-699,33</text:p>
          </table:table-cell>
          <table:table-cell office:value-type="float" office:value="-279.44" calcext:value-type="float">
            <text:p>-279,44</text:p>
          </table:table-cell>
          <table:table-cell office:value-type="float" office:value="3190.58" calcext:value-type="float">
            <text:p>3190,58</text:p>
          </table:table-cell>
          <table:table-cell office:value-type="float" office:value="-65.5" calcext:value-type="float">
            <text:p>-65,5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553.28" calcext:value-type="float">
            <text:p>-1553,28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22</text:p>
          </table:table-cell>
          <table:table-cell office:value-type="float" office:value="-1383.52" calcext:value-type="float">
            <text:p>-1383,52</text:p>
          </table:table-cell>
          <table:table-cell office:value-type="float" office:value="-109.54" calcext:value-type="float">
            <text:p>-109,54</text:p>
          </table:table-cell>
          <table:table-cell office:value-type="float" office:value="0" calcext:value-type="float">
            <text:p>0</text:p>
          </table:table-cell>
          <table:table-cell office:value-type="float" office:value="-205.06" calcext:value-type="float">
            <text:p>-205,06</text:p>
          </table:table-cell>
          <table:table-cell office:value-type="float" office:value="-271.61" calcext:value-type="float">
            <text:p>-271,61</text:p>
          </table:table-cell>
          <table:table-cell office:value-type="float" office:value="-486.9" calcext:value-type="float">
            <text:p>-486,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-50" calcext:value-type="float">
            <text:p>-5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4" calcext:value-type="float">
            <text:p>-594</text:p>
          </table:table-cell>
          <table:table-cell office:value-type="float" office:value="-474.65" calcext:value-type="float">
            <text:p>-474,65</text:p>
          </table:table-cell>
          <table:table-cell office:value-type="float" office:value="-421.17" calcext:value-type="float">
            <text:p>-421,17</text:p>
          </table:table-cell>
          <table:table-cell office:value-type="float" office:value="-377.6" calcext:value-type="float">
            <text:p>-377,6</text:p>
          </table:table-cell>
          <table:table-cell office:value-type="float" office:value="2796.37" calcext:value-type="float">
            <text:p>2796,37</text:p>
          </table:table-cell>
          <table:table-cell office:value-type="float" office:value="-48.29" calcext:value-type="float">
            <text:p>-48,2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47.34" calcext:value-type="float">
            <text:p>-47,34</text:p>
          </table:table-cell>
          <table:table-cell office:value-type="float" office:value="-957.76" calcext:value-type="float">
            <text:p>-957,7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i22</text:p>
          </table:table-cell>
          <table:table-cell office:value-type="float" office:value="15.14" calcext:value-type="float">
            <text:p>15,14</text:p>
          </table:table-cell>
          <table:table-cell office:value-type="float" office:value="-173.27" calcext:value-type="float">
            <text:p>-173,27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243.87" calcext:value-type="float">
            <text:p>-243,87</text:p>
          </table:table-cell>
          <table:table-cell office:value-type="float" office:value="-437.07" calcext:value-type="float">
            <text:p>-437,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.42" calcext:value-type="float">
            <text:p>-138,4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42.29" calcext:value-type="float">
            <text:p>-42,29</text:p>
          </table:table-cell>
          <table:table-cell office:value-type="float" office:value="-81.04" calcext:value-type="float">
            <text:p>-81,04</text:p>
          </table:table-cell>
          <table:table-cell office:value-type="float" office:value="-42.2" calcext:value-type="float">
            <text:p>-42,2</text:p>
          </table:table-cell>
          <table:table-cell office:value-type="float" office:value="3270.39" calcext:value-type="float">
            <text:p>3270,39</text:p>
          </table:table-cell>
          <table:table-cell office:value-type="float" office:value="82.76" calcext:value-type="float">
            <text:p>82,76</text:p>
          </table:table-cell>
          <table:table-cell office:value-type="float" office:value="0" calcext:value-type="float">
            <text:p>0</text:p>
          </table:table-cell>
          <table:table-cell office:value-type="float" office:value="-60.2" calcext:value-type="float">
            <text:p>-6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6.65" calcext:value-type="float">
            <text:p>-1416,6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n22</text:p>
          </table:table-cell>
          <table:table-cell office:value-type="float" office:value="384.08" calcext:value-type="float">
            <text:p>384,08</text:p>
          </table:table-cell>
          <table:table-cell office:value-type="float" office:value="-122.98" calcext:value-type="float">
            <text:p>-122,98</text:p>
          </table:table-cell>
          <table:table-cell office:value-type="float" office:value="-87.8" calcext:value-type="float">
            <text:p>-87,8</text:p>
          </table:table-cell>
          <table:table-cell office:value-type="float" office:value="-53.55" calcext:value-type="float">
            <text:p>-53,55</text:p>
          </table:table-cell>
          <table:table-cell office:value-type="float" office:value="-245.74" calcext:value-type="float">
            <text:p>-245,74</text:p>
          </table:table-cell>
          <table:table-cell office:value-type="float" office:value="-558.52" calcext:value-type="float">
            <text:p>-558,52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" calcext:value-type="float">
            <text:p>-14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357.9" calcext:value-type="float">
            <text:p>-357,9</text:p>
          </table:table-cell>
          <table:table-cell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50" calcext:value-type="float">
            <text:p>-650</text:p>
          </table:table-cell>
          <table:table-cell office:value-type="float" office:value="-264.16" calcext:value-type="float">
            <text:p>-264,16</text:p>
          </table:table-cell>
          <table:table-cell office:value-type="float" office:value="-192.87" calcext:value-type="float">
            <text:p>-192,87</text:p>
          </table:table-cell>
          <table:table-cell office:value-type="float" office:value="-391.03" calcext:value-type="float">
            <text:p>-391,03</text:p>
          </table:table-cell>
          <table:table-cell office:value-type="float" office:value="4073.79" calcext:value-type="float">
            <text:p>4073,79</text:p>
          </table:table-cell>
          <table:table-cell office:value-type="float" office:value="-75.79" calcext:value-type="float">
            <text:p>-75,79</text:p>
          </table:table-cell>
          <table:table-cell office:value-type="float" office:value="0" calcext:value-type="float">
            <text:p>0</text:p>
          </table:table-cell>
          <table:table-cell office:value-type="float" office:value="-63.2" calcext:value-type="float">
            <text:p>-63,2</text:p>
          </table:table-cell>
          <table:table-cell office:value-type="float" office:value="0" calcext:value-type="float">
            <text:p>0</text:p>
          </table:table-cell>
          <table:table-cell office:value-type="float" office:value="-93.45" calcext:value-type="float">
            <text:p>-93,45</text:p>
          </table:table-cell>
          <table:table-cell office:value-type="float" office:value="0" calcext:value-type="float">
            <text:p>0</text:p>
          </table:table-cell>
          <table:table-cell office:value-type="float" office:value="-69.9" calcext:value-type="float">
            <text:p>-69,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l22</text:p>
          </table:table-cell>
          <table:table-cell office:value-type="float" office:value="-371.78" calcext:value-type="float">
            <text:p>-371,78</text:p>
          </table:table-cell>
          <table:table-cell office:value-type="float" office:value="-74.99" calcext:value-type="float">
            <text:p>-74,99</text:p>
          </table:table-cell>
          <table:table-cell office:value-type="float" office:value="-350" calcext:value-type="float">
            <text:p>-350</text:p>
          </table:table-cell>
          <table:table-cell office:value-type="float" office:value="-797.05" calcext:value-type="float">
            <text:p>-797,05</text:p>
          </table:table-cell>
          <table:table-cell office:value-type="float" office:value="-272.17" calcext:value-type="float">
            <text:p>-272,17</text:p>
          </table:table-cell>
          <table:table-cell office:value-type="float" office:value="-514.54" calcext:value-type="float">
            <text:p>-514,54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19" calcext:value-type="float">
            <text:p>-29,19</text:p>
          </table:table-cell>
          <table:table-cell office:value-type="float" office:value="-50" calcext:value-type="float">
            <text:p>-5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91.12" calcext:value-type="float">
            <text:p>-191,12</text:p>
          </table:table-cell>
          <table:table-cell office:value-type="float" office:value="-39.95" calcext:value-type="float">
            <text:p>-39,95</text:p>
          </table:table-cell>
          <table:table-cell office:value-type="float" office:value="-234.7" calcext:value-type="float">
            <text:p>-234,7</text:p>
          </table:table-cell>
          <table:table-cell office:value-type="float" office:value="3357.95" calcext:value-type="float">
            <text:p>3357,95</text:p>
          </table:table-cell>
          <table:table-cell office:value-type="float" office:value="46.72" calcext:value-type="float">
            <text:p>46,72</text:p>
          </table:table-cell>
          <table:table-cell office:value-type="float" office:value="0" calcext:value-type="float">
            <text:p>0</text:p>
          </table:table-cell>
          <table:table-cell office:value-type="float" office:value="-53.66" calcext:value-type="float">
            <text:p>-53,66</text:p>
          </table:table-cell>
          <table:table-cell office:value-type="float" office:value="0" calcext:value-type="float">
            <text:p>0</text:p>
          </table:table-cell>
          <table:table-cell office:value-type="float" office:value="-502.08" calcext:value-type="float">
            <text:p>-502,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out22</text:p>
          </table:table-cell>
          <table:table-cell office:value-type="float" office:value="134.84" calcext:value-type="float">
            <text:p>134,84</text:p>
          </table:table-cell>
          <table:table-cell office:value-type="float" office:value="-188.15" calcext:value-type="float">
            <text:p>-188,15</text:p>
          </table:table-cell>
          <table:table-cell office:value-type="float" office:value="-235" calcext:value-type="float">
            <text:p>-235</text:p>
          </table:table-cell>
          <table:table-cell office:value-type="float" office:value="-10.6" calcext:value-type="float">
            <text:p>-10,6</text:p>
          </table:table-cell>
          <table:table-cell office:value-type="float" office:value="-244.91" calcext:value-type="float">
            <text:p>-244,91</text:p>
          </table:table-cell>
          <table:table-cell office:value-type="float" office:value="-743.63" calcext:value-type="float">
            <text:p>-743,63</text:p>
          </table:table-cell>
          <table:table-cell office:value-type="float" office:value="-133.5" calcext:value-type="float">
            <text:p>-133,5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80.83" calcext:value-type="float">
            <text:p>-180,83</text:p>
          </table:table-cell>
          <table:table-cell office:value-type="float" office:value="-20" calcext:value-type="float">
            <text:p>-20</text:p>
          </table:table-cell>
          <table:table-cell office:value-type="float" office:value="-23.5" calcext:value-type="float">
            <text:p>-23,5</text:p>
          </table:table-cell>
          <table:table-cell office:value-type="float" office:value="-90" calcext:value-type="float">
            <text:p>-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12.98" calcext:value-type="float">
            <text:p>-112,98</text:p>
          </table:table-cell>
          <table:table-cell office:value-type="float" office:value="-23.37" calcext:value-type="float">
            <text:p>-23,37</text:p>
          </table:table-cell>
          <table:table-cell office:value-type="float" office:value="-143.74" calcext:value-type="float">
            <text:p>-143,74</text:p>
          </table:table-cell>
          <table:table-cell office:value-type="float" office:value="3095.69" calcext:value-type="float">
            <text:p>3095,69</text:p>
          </table:table-cell>
          <table:table-cell office:value-type="float" office:value="62.76" calcext:value-type="float">
            <text:p>62,76</text:p>
          </table:table-cell>
          <table:table-cell office:value-type="float" office:value="0" calcext:value-type="float">
            <text:p>0</text:p>
          </table:table-cell>
          <table:table-cell office:value-type="float" office:value="-35.1" calcext:value-type="float">
            <text:p>-35,1</text:p>
          </table:table-cell>
          <table:table-cell office:value-type="float" office:value="0" calcext:value-type="float">
            <text:p>0</text:p>
          </table:table-cell>
          <table:table-cell office:value-type="float" office:value="-151.3" calcext:value-type="float">
            <text:p>-151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pt22</text:p>
          </table:table-cell>
          <table:table-cell office:value-type="float" office:value="6323.35" calcext:value-type="float">
            <text:p>6323,35</text:p>
          </table:table-cell>
          <table:table-cell office:value-type="float" office:value="-149.93" calcext:value-type="float">
            <text:p>-149,93</text:p>
          </table:table-cell>
          <table:table-cell office:value-type="float" office:value="200" calcext:value-type="float">
            <text:p>200</text:p>
          </table:table-cell>
          <table:table-cell office:value-type="float" office:value="-104.5" calcext:value-type="float">
            <text:p>-104,5</text:p>
          </table:table-cell>
          <table:table-cell office:value-type="float" office:value="-12" calcext:value-type="float">
            <text:p>-12</text:p>
          </table:table-cell>
          <table:table-cell office:value-type="float" office:value="-851.94" calcext:value-type="float">
            <text:p>-851,94</text:p>
          </table:table-cell>
          <table:table-cell office:value-type="float" office:value="4340" calcext:value-type="float">
            <text:p>4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3.85" calcext:value-type="float">
            <text:p>-273,8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68.5" calcext:value-type="float">
            <text:p>-668,5</text:p>
          </table:table-cell>
          <table:table-cell office:value-type="float" office:value="-81.54" calcext:value-type="float">
            <text:p>-81,54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-110.15" calcext:value-type="float">
            <text:p>-110,15</text:p>
          </table:table-cell>
          <table:table-cell office:value-type="float" office:value="4290.24" calcext:value-type="float">
            <text:p>4290,24</text:p>
          </table:table-cell>
          <table:table-cell office:value-type="float" office:value="-285.68" calcext:value-type="float">
            <text:p>-285,68</text:p>
          </table:table-cell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,9</text:p>
          </table:table-cell>
          <table:table-cell office:value-type="float" office:value="0" calcext:value-type="float">
            <text:p>0</text:p>
          </table:table-cell>
          <table:table-cell office:value-type="float" office:value="462.94" calcext:value-type="float">
            <text:p>462,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2</text:p>
          </table:table-cell>
          <table:table-cell office:value-type="float" office:value="-224.22" calcext:value-type="float">
            <text:p>-224,22</text:p>
          </table:table-cell>
          <table:table-cell office:value-type="float" office:value="-172.93" calcext:value-type="float">
            <text:p>-172,93</text:p>
          </table:table-cell>
          <table:table-cell office:value-type="float" office:value="-12.1" calcext:value-type="float">
            <text:p>-12,1</text:p>
          </table:table-cell>
          <table:table-cell office:value-type="float" office:value="18.5" calcext:value-type="float">
            <text:p>18,5</text:p>
          </table:table-cell>
          <table:table-cell office:value-type="float" office:value="-39.88" calcext:value-type="float">
            <text:p>-39,88</text:p>
          </table:table-cell>
          <table:table-cell office:value-type="float" office:value="-831.02" calcext:value-type="float">
            <text:p>-831,02</text:p>
          </table:table-cell>
          <table:table-cell office:value-type="float" office:value="-156.46" calcext:value-type="float">
            <text:p>-156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0.18" calcext:value-type="float">
            <text:p>-320,18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45" calcext:value-type="float">
            <text:p>-45</text:p>
          </table:table-cell>
          <table:table-cell office:value-type="float" office:value="-129.2" calcext:value-type="float">
            <text:p>-129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68.5" calcext:value-type="float">
            <text:p>-668,5</text:p>
          </table:table-cell>
          <table:table-cell office:value-type="float" office:value="-250.2" calcext:value-type="float">
            <text:p>-250,2</text:p>
          </table:table-cell>
          <table:table-cell office:value-type="float" office:value="-168.82" calcext:value-type="float">
            <text:p>-168,82</text:p>
          </table:table-cell>
          <table:table-cell office:value-type="float" office:value="-365.9" calcext:value-type="float">
            <text:p>-365,9</text:p>
          </table:table-cell>
          <table:table-cell office:value-type="float" office:value="3166.31" calcext:value-type="float">
            <text:p>3166,31</text:p>
          </table:table-cell>
          <table:table-cell office:value-type="float" office:value="78.77" calcext:value-type="float">
            <text:p>78,77</text:p>
          </table:table-cell>
          <table:table-cell office:value-type="float" office:value="0" calcext:value-type="float">
            <text:p>0</text:p>
          </table:table-cell>
          <table:table-cell office:value-type="float" office:value="-60.2" calcext:value-type="float">
            <text:p>-60,2</text:p>
          </table:table-cell>
          <table:table-cell office:value-type="float" office:value="0" calcext:value-type="float">
            <text:p>0</text:p>
          </table:table-cell>
          <table:table-cell office:value-type="float" office:value="-98.41" calcext:value-type="float">
            <text:p>-98,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2</text:p>
          </table:table-cell>
          <table:table-cell office:value-type="float" office:value="1105.3" calcext:value-type="float">
            <text:p>1105,3</text:p>
          </table:table-cell>
          <table:table-cell office:value-type="float" office:value="-216.92" calcext:value-type="float">
            <text:p>-216,92</text:p>
          </table:table-cell>
          <table:table-cell office:value-type="float" office:value="-120" calcext:value-type="float">
            <text:p>-120</text:p>
          </table:table-cell>
          <table:table-cell office:value-type="float" office:value="-677.44" calcext:value-type="float">
            <text:p>-677,44</text:p>
          </table:table-cell>
          <table:table-cell office:value-type="float" office:value="-12" calcext:value-type="float">
            <text:p>-12</text:p>
          </table:table-cell>
          <table:table-cell office:value-type="float" office:value="-703.29" calcext:value-type="float">
            <text:p>-703,29</text:p>
          </table:table-cell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33.05" calcext:value-type="float">
            <text:p>-133,05</text:p>
          </table:table-cell>
          <table:table-cell office:value-type="float" office:value="40" calcext:value-type="float">
            <text:p>4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79.2" calcext:value-type="float">
            <text:p>79,2</text:p>
          </table:table-cell>
          <table:table-cell office:value-type="float" office:value="-173.99" calcext:value-type="float">
            <text:p>-173,99</text:p>
          </table:table-cell>
          <table:table-cell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758.8" calcext:value-type="float">
            <text:p>-758,8</text:p>
          </table:table-cell>
          <table:table-cell office:value-type="float" office:value="-15.49" calcext:value-type="float">
            <text:p>-15,49</text:p>
          </table:table-cell>
          <table:table-cell office:value-type="float" office:value="-397.19" calcext:value-type="float">
            <text:p>-397,19</text:p>
          </table:table-cell>
          <table:table-cell office:value-type="float" office:value="-171.4" calcext:value-type="float">
            <text:p>-171,4</text:p>
          </table:table-cell>
          <table:table-cell office:value-type="float" office:value="4719.57" calcext:value-type="float">
            <text:p>4719,57</text:p>
          </table:table-cell>
          <table:table-cell office:value-type="float" office:value="-61.81" calcext:value-type="float">
            <text:p>-61,81</text:p>
          </table:table-cell>
          <table:table-cell office:value-type="float" office:value="0" calcext:value-type="float">
            <text:p>0</text:p>
          </table:table-cell>
          <table:table-cell office:value-type="float" office:value="-85.4" calcext:value-type="float">
            <text:p>-85,4</text:p>
          </table:table-cell>
          <table:table-cell office:value-type="float" office:value="0" calcext:value-type="float">
            <text:p>0</text:p>
          </table:table-cell>
          <table:table-cell office:value-type="float" office:value="-117.09" calcext:value-type="float">
            <text:p>-117,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2</text:p>
          </table:table-cell>
          <table:table-cell office:value-type="float" office:value="-494.8" calcext:value-type="float">
            <text:p>-494,8</text:p>
          </table:table-cell>
          <table:table-cell office:value-type="float" office:value="-236.92" calcext:value-type="float">
            <text:p>-236,92</text:p>
          </table:table-cell>
          <table:table-cell office:value-type="float" office:value="-20" calcext:value-type="float">
            <text:p>-20</text:p>
          </table:table-cell>
          <table:table-cell office:value-type="float" office:value="-873.77" calcext:value-type="float">
            <text:p>-873,77</text:p>
          </table:table-cell>
          <table:table-cell office:value-type="float" office:value="62.35" calcext:value-type="float">
            <text:p>62,35</text:p>
          </table:table-cell>
          <table:table-cell office:value-type="float" office:value="-831.97" calcext:value-type="float">
            <text:p>-831,97</text:p>
          </table:table-cell>
          <table:table-cell office:value-type="float" office:value="-200.05" calcext:value-type="float">
            <text:p>-20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.71" calcext:value-type="float">
            <text:p>-115,7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8.01" calcext:value-type="float">
            <text:p>28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68.5" calcext:value-type="float">
            <text:p>-668,5</text:p>
          </table:table-cell>
          <table:table-cell office:value-type="float" office:value="-229.57" calcext:value-type="float">
            <text:p>-229,57</text:p>
          </table:table-cell>
          <table:table-cell office:value-type="float" office:value="-240.94" calcext:value-type="float">
            <text:p>-240,94</text:p>
          </table:table-cell>
          <table:table-cell office:value-type="float" office:value="-213.33" calcext:value-type="float">
            <text:p>-213,33</text:p>
          </table:table-cell>
          <table:table-cell office:value-type="float" office:value="3807.94" calcext:value-type="float">
            <text:p>3807,94</text:p>
          </table:table-cell>
          <table:table-cell office:value-type="float" office:value="-117.59" calcext:value-type="float">
            <text:p>-117,59</text:p>
          </table:table-cell>
          <table:table-cell office:value-type="float" office:value="0" calcext:value-type="float">
            <text:p>0</text:p>
          </table:table-cell>
          <table:table-cell office:value-type="float" office:value="-22.8" calcext:value-type="float">
            <text:p>-22,8</text:p>
          </table:table-cell>
          <table:table-cell office:value-type="float" office:value="0" calcext:value-type="float">
            <text:p>0</text:p>
          </table:table-cell>
          <table:table-cell office:value-type="float" office:value="-119.35" calcext:value-type="float">
            <text:p>-119,35</text:p>
          </table:table-cell>
          <table:table-cell office:value-type="float" office:value="0" calcext:value-type="float">
            <text:p>0</text:p>
          </table:table-cell>
          <table:table-cell office:value-type="float" office:value="-357.6" calcext:value-type="float">
            <text:p>-357,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3</text:p>
          </table:table-cell>
          <table:table-cell office:value-type="float" office:value="217.87" calcext:value-type="float">
            <text:p>217,87</text:p>
          </table:table-cell>
          <table:table-cell office:value-type="float" office:value="-233.92" calcext:value-type="float">
            <text:p>-233,92</text:p>
          </table:table-cell>
          <table:table-cell office:value-type="float" office:value="-95.46" calcext:value-type="float">
            <text:p>-95,46</text:p>
          </table:table-cell>
          <table:table-cell office:value-type="float" office:value="486.72" calcext:value-type="float">
            <text:p>486,72</text:p>
          </table:table-cell>
          <table:table-cell office:value-type="float" office:value="-38.7" calcext:value-type="float">
            <text:p>-38,7</text:p>
          </table:table-cell>
          <table:table-cell office:value-type="float" office:value="-653.65" calcext:value-type="float">
            <text:p>-653,65</text:p>
          </table:table-cell>
          <table:table-cell office:value-type="float" office:value="946.6" calcext:value-type="float">
            <text:p>94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4" calcext:value-type="float">
            <text:p>-66,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office:value-type="float" office:value="-150" calcext:value-type="float">
            <text:p>-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12.68" calcext:value-type="float">
            <text:p>12,68</text:p>
          </table:table-cell>
          <table:table-cell office:value-type="float" office:value="-208.36" calcext:value-type="float">
            <text:p>-208,36</text:p>
          </table:table-cell>
          <table:table-cell office:value-type="float" office:value="-337.85" calcext:value-type="float">
            <text:p>-337,85</text:p>
          </table:table-cell>
          <table:table-cell office:value-type="float" office:value="2578.87" calcext:value-type="float">
            <text:p>2578,87</text:p>
          </table:table-cell>
          <table:table-cell office:value-type="float" office:value="-76.97" calcext:value-type="float">
            <text:p>-76,97</text:p>
          </table:table-cell>
          <table:table-cell office:value-type="float" office:value="0" calcext:value-type="float">
            <text:p>0</text:p>
          </table:table-cell>
          <table:table-cell office:value-type="float" office:value="-55.65" calcext:value-type="float">
            <text:p>-55,65</text:p>
          </table:table-cell>
          <table:table-cell office:value-type="float" office:value="0" calcext:value-type="float">
            <text:p>0</text:p>
          </table:table-cell>
          <table:table-cell office:value-type="float" office:value="-576.46" calcext:value-type="float">
            <text:p>-576,46</text:p>
          </table:table-cell>
          <table:table-cell office:value-type="float" office:value="0" calcext:value-type="float">
            <text:p>0</text:p>
          </table:table-cell>
          <table:table-cell office:value-type="float" office:value="-528.08" calcext:value-type="float">
            <text:p>-528,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3</text:p>
          </table:table-cell>
          <table:table-cell office:value-type="float" office:value="1112.75" calcext:value-type="float">
            <text:p>1112,75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0" calcext:value-type="float">
            <text:p>-20</text:p>
          </table:table-cell>
          <table:table-cell office:value-type="float" office:value="-113.75" calcext:value-type="float">
            <text:p>-113,75</text:p>
          </table:table-cell>
          <table:table-cell office:value-type="float" office:value="-12" calcext:value-type="float">
            <text:p>-12</text:p>
          </table:table-cell>
          <table:table-cell office:value-type="float" office:value="-1083.79" calcext:value-type="float">
            <text:p>-1083,79</text:p>
          </table:table-cell>
          <table:table-cell office:value-type="float" office:value="0" calcext:value-type="float">
            <text:p>0</text:p>
          </table:table-cell>
          <table:table-cell office:value-type="float" office:value="-36.8" calcext:value-type="float">
            <text:p>-36,8</text:p>
          </table:table-cell>
          <table:table-cell office:value-type="float" office:value="0" calcext:value-type="float">
            <text:p>0</text:p>
          </table:table-cell>
          <table:table-cell office:value-type="float" office:value="-52.89" calcext:value-type="float">
            <text:p>-52,8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16.53" calcext:value-type="float">
            <text:p>16,53</text:p>
          </table:table-cell>
          <table:table-cell office:value-type="float" office:value="-196.56" calcext:value-type="float">
            <text:p>-196,56</text:p>
          </table:table-cell>
          <table:table-cell office:value-type="float" office:value="-96.76" calcext:value-type="float">
            <text:p>-96,76</text:p>
          </table:table-cell>
          <table:table-cell office:value-type="float" office:value="3937" calcext:value-type="float">
            <text:p>3937</text:p>
          </table:table-cell>
          <table:table-cell office:value-type="float" office:value="-4.75" calcext:value-type="float">
            <text:p>-4,75</text:p>
          </table:table-cell>
          <table:table-cell office:value-type="float" office:value="0" calcext:value-type="float">
            <text:p>0</text:p>
          </table:table-cell>
          <table:table-cell office:value-type="float" office:value="-80.6" calcext:value-type="float">
            <text:p>-80,6</text:p>
          </table:table-cell>
          <table:table-cell office:value-type="float" office:value="0" calcext:value-type="float">
            <text:p>0</text:p>
          </table:table-cell>
          <table:table-cell office:value-type="float" office:value="-226.92" calcext:value-type="float">
            <text:p>-226,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23</text:p>
          </table:table-cell>
          <table:table-cell office:value-type="float" office:value="836.21" calcext:value-type="float">
            <text:p>836,21</text:p>
          </table:table-cell>
          <table:table-cell office:value-type="float" office:value="-209.22" calcext:value-type="float">
            <text:p>-209,22</text:p>
          </table:table-cell>
          <table:table-cell office:value-type="float" office:value="0" calcext:value-type="float">
            <text:p>0</text:p>
          </table:table-cell>
          <table:table-cell office:value-type="float" office:value="277.19" calcext:value-type="float">
            <text:p>277,19</text:p>
          </table:table-cell>
          <table:table-cell office:value-type="float" office:value="-12" calcext:value-type="float">
            <text:p>-12</text:p>
          </table:table-cell>
          <table:table-cell office:value-type="float" office:value="-1006.31" calcext:value-type="float">
            <text:p>-1006,31</text:p>
          </table:table-cell>
          <table:table-cell office:value-type="float" office:value="0" calcext:value-type="float">
            <text:p>0</text:p>
          </table:table-cell>
          <table:table-cell office:value-type="float" office:value="-9.7" calcext:value-type="float">
            <text:p>-9,7</text:p>
          </table:table-cell>
          <table:table-cell office:value-type="float" office:value="0" calcext:value-type="float">
            <text:p>0</text:p>
          </table:table-cell>
          <table:table-cell office:value-type="float" office:value="-22.15" calcext:value-type="float">
            <text:p>-22,1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8" calcext:value-type="float">
            <text:p>-121,8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82.31" calcext:value-type="float">
            <text:p>-82,31</text:p>
          </table:table-cell>
          <table:table-cell office:value-type="float" office:value="-119.1" calcext:value-type="float">
            <text:p>-119,1</text:p>
          </table:table-cell>
          <table:table-cell office:value-type="float" office:value="-164" calcext:value-type="float">
            <text:p>-164</text:p>
          </table:table-cell>
          <table:table-cell office:value-type="float" office:value="3373.29" calcext:value-type="float">
            <text:p>3373,29</text:p>
          </table:table-cell>
          <table:table-cell office:value-type="float" office:value="-30.86" calcext:value-type="float">
            <text:p>-30,86</text:p>
          </table:table-cell>
          <table:table-cell office:value-type="float" office:value="0" calcext:value-type="float">
            <text:p>0</text:p>
          </table:table-cell>
          <table:table-cell office:value-type="float" office:value="-55.8" calcext:value-type="float">
            <text:p>-55,8</text:p>
          </table:table-cell>
          <table:table-cell office:value-type="float" office:value="0" calcext:value-type="float">
            <text:p>0</text:p>
          </table:table-cell>
          <table:table-cell office:value-type="float" office:value="-215.52" calcext:value-type="float">
            <text:p>-215,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il23</text:p>
          </table:table-cell>
          <table:table-cell office:value-type="float" office:value="8014.55" calcext:value-type="float">
            <text:p>8014,55</text:p>
          </table:table-cell>
          <table:table-cell office:value-type="float" office:value="-206.5" calcext:value-type="float">
            <text:p>-206,5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-37.2" calcext:value-type="float">
            <text:p>-37,2</text:p>
          </table:table-cell>
          <table:table-cell office:value-type="float" office:value="-1078.38" calcext:value-type="float">
            <text:p>-1078,38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6" calcext:value-type="float">
            <text:p>-70,6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444.82" calcext:value-type="float">
            <text:p>-444,82</text:p>
          </table:table-cell>
          <table:table-cell office:value-type="float" office:value="-259.8" calcext:value-type="float">
            <text:p>-259,8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11,466,92</text:p>
          </table:table-cell>
          <table:table-cell office:value-type="float" office:value="10.64" calcext:value-type="float">
            <text:p>10,64</text:p>
          </table:table-cell>
          <table:table-cell office:value-type="float" office:value="0" calcext:value-type="float">
            <text:p>0</text:p>
          </table:table-cell>
          <table:table-cell office:value-type="float" office:value="-38.5" calcext:value-type="float">
            <text:p>-38,5</text:p>
          </table:table-cell>
          <table:table-cell office:value-type="float" office:value="0" calcext:value-type="float">
            <text:p>0</text:p>
          </table:table-cell>
          <table:table-cell office:value-type="float" office:value="-198.71" calcext:value-type="float">
            <text:p>-198,71</text:p>
          </table:table-cell>
          <table:table-cell office:value-type="float" office:value="0" calcext:value-type="float">
            <text:p>0</text:p>
          </table:table-cell>
          <table:table-cell office:value-type="float" office:value="-323.8" calcext:value-type="float">
            <text:p>-323,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i23</text:p>
          </table:table-cell>
          <table:table-cell office:value-type="float" office:value="646.67" calcext:value-type="float">
            <text:p>646,67</text:p>
          </table:table-cell>
          <table:table-cell office:value-type="float" office:value="-304.91" calcext:value-type="float">
            <text:p>-304,91</text:p>
          </table:table-cell>
          <table:table-cell office:value-type="float" office:value="-1" calcext:value-type="float">
            <text:p>-1</text:p>
          </table:table-cell>
          <table:table-cell office:value-type="float" office:value="-6.09" calcext:value-type="float">
            <text:p>-6,09</text:p>
          </table:table-cell>
          <table:table-cell office:value-type="float" office:value="-12" calcext:value-type="float">
            <text:p>-12</text:p>
          </table:table-cell>
          <table:table-cell office:value-type="float" office:value="-1269.58" calcext:value-type="float">
            <text:p>-1269,58</text:p>
          </table:table-cell>
          <table:table-cell office:value-type="float" office:value="0.2" calcext:value-type="float">
            <text:p>0,2</text:p>
          </table:table-cell>
          <table:table-cell office:value-type="float" office:value="-196.74" calcext:value-type="float">
            <text:p>-196,74</text:p>
          </table:table-cell>
          <table:table-cell office:value-type="float" office:value="0" calcext:value-type="float">
            <text:p>0</text:p>
          </table:table-cell>
          <table:table-cell office:value-type="float" office:value="-274.42" calcext:value-type="float">
            <text:p>-274,42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55" calcext:value-type="float">
            <text:p>-221,55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12.72" calcext:value-type="float">
            <text:p>-12,72</text:p>
          </table:table-cell>
          <table:table-cell office:value-type="float" office:value="-209.16" calcext:value-type="float">
            <text:p>-209,16</text:p>
          </table:table-cell>
          <table:table-cell office:value-type="float" office:value="-129.1" calcext:value-type="float">
            <text:p>-129,1</text:p>
          </table:table-cell>
          <table:table-cell office:value-type="float" office:value="4229.75" calcext:value-type="float">
            <text:p>4229,75</text:p>
          </table:table-cell>
          <table:table-cell office:value-type="float" office:value="-21.69" calcext:value-type="float">
            <text:p>-21,69</text:p>
          </table:table-cell>
          <table:table-cell office:value-type="float" office:value="0" calcext:value-type="float">
            <text:p>0</text:p>
          </table:table-cell>
          <table:table-cell office:value-type="float" office:value="-66.4" calcext:value-type="float">
            <text:p>-66,4</text:p>
          </table:table-cell>
          <table:table-cell office:value-type="float" office:value="0" calcext:value-type="float">
            <text:p>0</text:p>
          </table:table-cell>
          <table:table-cell office:value-type="float" office:value="-72.44" calcext:value-type="float">
            <text:p>-72,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n23</text:p>
          </table:table-cell>
          <table:table-cell office:value-type="float" office:value="189.9" calcext:value-type="float">
            <text:p>189,9</text:p>
          </table:table-cell>
          <table:table-cell office:value-type="float" office:value="-208.47" calcext:value-type="float">
            <text:p>-208,47</text:p>
          </table:table-cell>
          <table:table-cell office:value-type="float" office:value="69.88" calcext:value-type="float">
            <text:p>69,88</text:p>
          </table:table-cell>
          <table:table-cell office:value-type="float" office:value="1669.36" calcext:value-type="float">
            <text:p>1669,36</text:p>
          </table:table-cell>
          <table:table-cell office:value-type="float" office:value="-14.14" calcext:value-type="float">
            <text:p>-14,14</text:p>
          </table:table-cell>
          <table:table-cell office:value-type="float" office:value="-612.21" calcext:value-type="float">
            <text:p>-612,21</text:p>
          </table:table-cell>
          <table:table-cell office:value-type="float" office:value="-142.76" calcext:value-type="float">
            <text:p>-142,76</text:p>
          </table:table-cell>
          <table:table-cell office:value-type="float" office:value="-24.5" calcext:value-type="float">
            <text:p>-24,5</text:p>
          </table:table-cell>
          <table:table-cell office:value-type="float" office:value="0" calcext:value-type="float">
            <text:p>0</text:p>
          </table:table-cell>
          <table:table-cell office:value-type="float" office:value="-60.54" calcext:value-type="float">
            <text:p>-60,54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-512.35" calcext:value-type="float">
            <text:p>-512,35</text:p>
          </table:table-cell>
          <table:table-cell office:value-type="float" office:value="-73.19" calcext:value-type="float">
            <text:p>-73,19</text:p>
          </table:table-cell>
          <table:table-cell office:value-type="float" office:value="-33.63" calcext:value-type="float">
            <text:p>-33,63</text:p>
          </table:table-cell>
          <table:table-cell office:value-type="float" office:value="-18.5" calcext:value-type="float">
            <text:p>-18,5</text:p>
          </table:table-cell>
          <table:table-cell office:value-type="float" office:value="4045.54" calcext:value-type="float">
            <text:p>4045,54</text:p>
          </table:table-cell>
          <table:table-cell office:value-type="float" office:value="-56.58" calcext:value-type="float">
            <text:p>-56,58</text:p>
          </table:table-cell>
          <table:table-cell office:value-type="float" office:value="0" calcext:value-type="float">
            <text:p>0</text:p>
          </table:table-cell>
          <table:table-cell office:value-type="float" office:value="-50.6" calcext:value-type="float">
            <text:p>-50,6</text:p>
          </table:table-cell>
          <table:table-cell office:value-type="float" office:value="0" calcext:value-type="float">
            <text:p>0</text:p>
          </table:table-cell>
          <table:table-cell office:value-type="float" office:value="-211.66" calcext:value-type="float">
            <text:p>-211,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l23</text:p>
          </table:table-cell>
          <table:table-cell office:value-type="float" office:value="47.08" calcext:value-type="float">
            <text:p>47,08</text:p>
          </table:table-cell>
          <table:table-cell office:value-type="float" office:value="-176.47" calcext:value-type="float">
            <text:p>-176,47</text:p>
          </table:table-cell>
          <table:table-cell office:value-type="float" office:value="1041" calcext:value-type="float">
            <text:p>1041</text:p>
          </table:table-cell>
          <table:table-cell office:value-type="float" office:value="-1000" calcext:value-type="float">
            <text:p>-1000</text:p>
          </table:table-cell>
          <table:table-cell office:value-type="float" office:value="-43.44" calcext:value-type="float">
            <text:p>-43,44</text:p>
          </table:table-cell>
          <table:table-cell office:value-type="float" office:value="-829.15" calcext:value-type="float">
            <text:p>-829,15</text:p>
          </table:table-cell>
          <table:table-cell office:value-type="float" office:value="-44.5" calcext:value-type="float">
            <text:p>-44,5</text:p>
          </table:table-cell>
          <table:table-cell office:value-type="float" office:value="-24.3" calcext:value-type="float">
            <text:p>-24,3</text:p>
          </table:table-cell>
          <table:table-cell office:value-type="float" office:value="0" calcext:value-type="float">
            <text:p>0</text:p>
          </table:table-cell>
          <table:table-cell office:value-type="float" office:value="-346.4" calcext:value-type="float">
            <text:p>-346,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.98" calcext:value-type="float">
            <text:p>-163,98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220.85" calcext:value-type="float">
            <text:p>-220,85</text:p>
          </table:table-cell>
          <table:table-cell office:value-type="float" office:value="-166.07" calcext:value-type="float">
            <text:p>-166,07</text:p>
          </table:table-cell>
          <table:table-cell office:value-type="float" office:value="-44.85" calcext:value-type="float">
            <text:p>-44,85</text:p>
          </table:table-cell>
          <table:table-cell office:value-type="float" office:value="3271.65" calcext:value-type="float">
            <text:p>3271,65</text:p>
          </table:table-cell>
          <table:table-cell office:value-type="float" office:value="-3.74" calcext:value-type="float">
            <text:p>-3,74</text:p>
          </table:table-cell>
          <table:table-cell office:value-type="float" office:value="0" calcext:value-type="float">
            <text:p>0</text:p>
          </table:table-cell>
          <table:table-cell office:value-type="float" office:value="-85.3" calcext:value-type="float">
            <text:p>-85,3</text:p>
          </table:table-cell>
          <table:table-cell office:value-type="float" office:value="0" calcext:value-type="float">
            <text:p>0</text:p>
          </table:table-cell>
          <table:table-cell office:value-type="float" office:value="-126.55" calcext:value-type="float">
            <text:p>-126,55</text:p>
          </table:table-cell>
          <table:table-cell office:value-type="float" office:value="0" calcext:value-type="float">
            <text:p>0</text:p>
          </table:table-cell>
          <table:table-cell office:value-type="float" office:value="-200.69" calcext:value-type="float">
            <text:p>-200,6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out23</text:p>
          </table:table-cell>
          <table:table-cell office:value-type="float" office:value="-729.02" calcext:value-type="float">
            <text:p>-729,02</text:p>
          </table:table-cell>
          <table:table-cell office:value-type="float" office:value="-371.95" calcext:value-type="float">
            <text:p>-371,95</text:p>
          </table:table-cell>
          <table:table-cell office:value-type="float" office:value="-4.84" calcext:value-type="float">
            <text:p>-4,84</text:p>
          </table:table-cell>
          <table:table-cell office:value-type="float" office:value="-474.85" calcext:value-type="float">
            <text:p>-474,85</text:p>
          </table:table-cell>
          <table:table-cell office:value-type="float" office:value="-12.7" calcext:value-type="float">
            <text:p>-12,7</text:p>
          </table:table-cell>
          <table:table-cell office:value-type="float" office:value="-1009.73" calcext:value-type="float">
            <text:p>-1009,73</text:p>
          </table:table-cell>
          <table:table-cell office:value-type="float" office:value="-140" calcext:value-type="float">
            <text:p>-140</text:p>
          </table:table-cell>
          <table:table-cell office:value-type="float" office:value="-35.5" calcext:value-type="float">
            <text:p>-35,5</text:p>
          </table:table-cell>
          <table:table-cell office:value-type="float" office:value="0" calcext:value-type="float">
            <text:p>0</text:p>
          </table:table-cell>
          <table:table-cell office:value-type="float" office:value="-224.46" calcext:value-type="float">
            <text:p>-224,46</text:p>
          </table:table-cell>
          <table:table-cell office:value-type="float" office:value="-100" calcext:value-type="float">
            <text:p>-100</text:p>
          </table:table-cell>
          <table:table-cell office:value-type="float" office:value="-15" calcext:value-type="float">
            <text:p>-15</text:p>
          </table:table-cell>
          <table:table-cell office:value-type="float" office:value="-45" calcext:value-type="float">
            <text:p>-4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97.15" calcext:value-type="float">
            <text:p>-197,15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49.63" calcext:value-type="float">
            <text:p>-49,63</text:p>
          </table:table-cell>
          <table:table-cell office:value-type="float" office:value="-101.71" calcext:value-type="float">
            <text:p>-101,71</text:p>
          </table:table-cell>
          <table:table-cell office:value-type="float" office:value="-93.7" calcext:value-type="float">
            <text:p>-93,7</text:p>
          </table:table-cell>
          <table:table-cell office:value-type="float" office:value="3063.15" calcext:value-type="float">
            <text:p>3063,15</text:p>
          </table:table-cell>
          <table:table-cell office:value-type="float" office:value="-9.85" calcext:value-type="float">
            <text:p>-9,85</text:p>
          </table:table-cell>
          <table:table-cell office:value-type="float" office:value="0" calcext:value-type="float">
            <text:p>0</text:p>
          </table:table-cell>
          <table:table-cell office:value-type="float" office:value="-41.5" calcext:value-type="float">
            <text:p>-41,5</text:p>
          </table:table-cell>
          <table:table-cell office:value-type="float" office:value="-29.2" calcext:value-type="float">
            <text:p>-29,2</text:p>
          </table:table-cell>
          <table:table-cell office:value-type="float" office:value="-227.07" calcext:value-type="float">
            <text:p>-227,07</text:p>
          </table:table-cell>
          <table:table-cell office:value-type="float" office:value="0" calcext:value-type="float">
            <text:p>0</text:p>
          </table:table-cell>
          <table:table-cell office:value-type="float" office:value="10.17" calcext:value-type="float">
            <text:p>10,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pt23</text:p>
          </table:table-cell>
          <table:table-cell office:value-type="float" office:value="836.95" calcext:value-type="float">
            <text:p>836,95</text:p>
          </table:table-cell>
          <table:table-cell office:value-type="float" office:value="-166.46" calcext:value-type="float">
            <text:p>-166,46</text:p>
          </table:table-cell>
          <table:table-cell office:value-type="float" office:value="0" calcext:value-type="float">
            <text:p>0</text:p>
          </table:table-cell>
          <table:table-cell office:value-type="float" office:value="-559.4" calcext:value-type="float">
            <text:p>-559,4</text:p>
          </table:table-cell>
          <table:table-cell office:value-type="float" office:value="-12.24" calcext:value-type="float">
            <text:p>-12,24</text:p>
          </table:table-cell>
          <table:table-cell office:value-type="float" office:value="-860.64" calcext:value-type="float">
            <text:p>-860,64</text:p>
          </table:table-cell>
          <table:table-cell office:value-type="float" office:value="-85" calcext:value-type="float">
            <text:p>-85</text:p>
          </table:table-cell>
          <table:table-cell office:value-type="float" office:value="-304.6" calcext:value-type="float">
            <text:p>-304,6</text:p>
          </table:table-cell>
          <table:table-cell office:value-type="float" office:value="-33" calcext:value-type="float">
            <text:p>-33</text:p>
          </table:table-cell>
          <table:table-cell office:value-type="float" office:value="-256.99" calcext:value-type="float">
            <text:p>-256,99</text:p>
          </table:table-cell>
          <table:table-cell office:value-type="float" office:value="-60" calcext:value-type="float">
            <text:p>-60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6.5" calcext:value-type="float">
            <text:p>-96,5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231.08" calcext:value-type="float">
            <text:p>-231,08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4440.04" calcext:value-type="float">
            <text:p>4440,04</text:p>
          </table:table-cell>
          <table:table-cell office:value-type="float" office:value="-1.93" calcext:value-type="float">
            <text:p>-1,93</text:p>
          </table:table-cell>
          <table:table-cell office:value-type="float" office:value="0" calcext:value-type="float">
            <text:p>0</text:p>
          </table:table-cell>
          <table:table-cell office:value-type="float" office:value="-29.8" calcext:value-type="float">
            <text:p>-29,8</text:p>
          </table:table-cell>
          <table:table-cell office:value-type="float" office:value="0" calcext:value-type="float">
            <text:p>0</text:p>
          </table:table-cell>
          <table:table-cell office:value-type="float" office:value="-59.13" calcext:value-type="float">
            <text:p>-59,13</text:p>
          </table:table-cell>
          <table:table-cell office:value-type="float" office:value="-90.62" calcext:value-type="float">
            <text:p>-90,62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3</text:p>
          </table:table-cell>
          <table:table-cell office:value-type="float" office:value="-665.17" calcext:value-type="float">
            <text:p>-665,17</text:p>
          </table:table-cell>
          <table:table-cell office:value-type="float" office:value="-269.46" calcext:value-type="float">
            <text:p>-269,46</text:p>
          </table:table-cell>
          <table:table-cell office:value-type="float" office:value="0" calcext:value-type="float">
            <text:p>0</text:p>
          </table:table-cell>
          <table:table-cell office:value-type="float" office:value="-300.02" calcext:value-type="float">
            <text:p>-300,02</text:p>
          </table:table-cell>
          <table:table-cell office:value-type="float" office:value="-66.76" calcext:value-type="float">
            <text:p>-66,76</text:p>
          </table:table-cell>
          <table:table-cell office:value-type="float" office:value="-795.16" calcext:value-type="float">
            <text:p>-795,16</text:p>
          </table:table-cell>
          <table:table-cell office:value-type="float" office:value="-20" calcext:value-type="float">
            <text:p>-20</text:p>
          </table:table-cell>
          <table:table-cell office:value-type="float" office:value="-57.29" calcext:value-type="float">
            <text:p>-57,29</text:p>
          </table:table-cell>
          <table:table-cell office:value-type="float" office:value="-22.5" calcext:value-type="float">
            <text:p>-22,5</text:p>
          </table:table-cell>
          <table:table-cell office:value-type="float" office:value="-75" calcext:value-type="float">
            <text:p>-75</text:p>
          </table:table-cell>
          <table:table-cell office:value-type="float" office:value="-20" calcext:value-type="float">
            <text:p>-20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office:value-type="float" office:value="-72.82" calcext:value-type="float">
            <text:p>-72,82</text:p>
          </table:table-cell>
          <table:table-cell office:value-type="float" office:value="0" calcext:value-type="float">
            <text:p>0</text:p>
          </table:table-cell>
          <table:table-cell office:value-type="float" office:value="-24.3" calcext:value-type="float">
            <text:p>-24,3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8.43" calcext:value-type="float">
            <text:p>-8,43</text:p>
          </table:table-cell>
          <table:table-cell office:value-type="float" office:value="-253.81" calcext:value-type="float">
            <text:p>-253,81</text:p>
          </table:table-cell>
          <table:table-cell office:value-type="float" office:value="-105.3" calcext:value-type="float">
            <text:p>-105,3</text:p>
          </table:table-cell>
          <table:table-cell office:value-type="float" office:value="3095.48" calcext:value-type="float">
            <text:p>3095,48</text:p>
          </table:table-cell>
          <table:table-cell office:value-type="float" office:value="-124.34" calcext:value-type="float">
            <text:p>-124,34</text:p>
          </table:table-cell>
          <table:table-cell office:value-type="float" office:value="0" calcext:value-type="float">
            <text:p>0</text:p>
          </table:table-cell>
          <table:table-cell office:value-type="float" office:value="-94.5" calcext:value-type="float">
            <text:p>-94,5</text:p>
          </table:table-cell>
          <table:table-cell office:value-type="float" office:value="0" calcext:value-type="float">
            <text:p>0</text:p>
          </table:table-cell>
          <table:table-cell office:value-type="float" office:value="-261.66" calcext:value-type="float">
            <text:p>-261,66</text:p>
          </table:table-cell>
          <table:table-cell office:value-type="float" office:value="-406.58" calcext:value-type="float">
            <text:p>-406,58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3</text:p>
          </table:table-cell>
          <table:table-cell office:value-type="float" office:value="-899.8" calcext:value-type="float">
            <text:p>-899,8</text:p>
          </table:table-cell>
          <table:table-cell office:value-type="float" office:value="-254.58" calcext:value-type="float">
            <text:p>-254,58</text:p>
          </table:table-cell>
          <table:table-cell office:value-type="float" office:value="-53.6" calcext:value-type="float">
            <text:p>-53,6</text:p>
          </table:table-cell>
          <table:table-cell office:value-type="float" office:value="-405.46" calcext:value-type="float">
            <text:p>-405,46</text:p>
          </table:table-cell>
          <table:table-cell office:value-type="float" office:value="-14.94" calcext:value-type="float">
            <text:p>-14,94</text:p>
          </table:table-cell>
          <table:table-cell office:value-type="float" office:value="-866.43" calcext:value-type="float">
            <text:p>-866,43</text:p>
          </table:table-cell>
          <table:table-cell office:value-type="float" office:value="75.1" calcext:value-type="float">
            <text:p>75,1</text:p>
          </table:table-cell>
          <table:table-cell office:value-type="float" office:value="-875.28" calcext:value-type="float">
            <text:p>-875,28</text:p>
          </table:table-cell>
          <table:table-cell office:value-type="float" office:value="0" calcext:value-type="float">
            <text:p>0</text:p>
          </table:table-cell>
          <table:table-cell office:value-type="float" office:value="-76.67" calcext:value-type="float">
            <text:p>-76,67</text:p>
          </table:table-cell>
          <table:table-cell office:value-type="float" office:value="0" calcext:value-type="float">
            <text:p>0</text:p>
          </table:table-cell>
          <table:table-cell office:value-type="float" office:value="-17.35" calcext:value-type="float">
            <text:p>-17,35</text:p>
          </table:table-cell>
          <table:table-cell office:value-type="float" office:value="-145" calcext:value-type="float">
            <text:p>-145</text:p>
          </table:table-cell>
          <table:table-cell office:value-type="float" office:value="79.2" calcext:value-type="float">
            <text:p>79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189.09" calcext:value-type="float">
            <text:p>-189,09</text:p>
          </table:table-cell>
          <table:table-cell office:value-type="float" office:value="-202.88" calcext:value-type="float">
            <text:p>-202,88</text:p>
          </table:table-cell>
          <table:table-cell table:formula="of:=-42.1-56" office:value-type="float" office:value="-98.1" calcext:value-type="float">
            <text:p>-98,1</text:p>
          </table:table-cell>
          <table:table-cell office:value-type="float" office:value="3211.33" calcext:value-type="float">
            <text:p>3211,33</text:p>
          </table:table-cell>
          <table:table-cell office:value-type="float" office:value="-49.46" calcext:value-type="float">
            <text:p>-49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2.91" calcext:value-type="float">
            <text:p>-222,91</text:p>
          </table:table-cell>
          <table:table-cell office:value-type="float" office:value="0" calcext:value-type="float">
            <text:p>0</text:p>
          </table:table-cell>
          <table:table-cell office:value-type="float" office:value="-55.98" calcext:value-type="float">
            <text:p>-55,9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3</text:p>
          </table:table-cell>
          <table:table-cell office:value-type="float" office:value="817.17" calcext:value-type="float">
            <text:p>817,17</text:p>
          </table:table-cell>
          <table:table-cell office:value-type="float" office:value="-146.47" calcext:value-type="float">
            <text:p>-146,47</text:p>
          </table:table-cell>
          <table:table-cell office:value-type="float" office:value="-348.79" calcext:value-type="float">
            <text:p>-348,79</text:p>
          </table:table-cell>
          <table:table-cell office:value-type="float" office:value="-995.37" calcext:value-type="float">
            <text:p>-995,37</text:p>
          </table:table-cell>
          <table:table-cell office:value-type="float" office:value="-57.54" calcext:value-type="float">
            <text:p>-57,54</text:p>
          </table:table-cell>
          <table:table-cell office:value-type="float" office:value="-841.84" calcext:value-type="float">
            <text:p>-841,84</text:p>
          </table:table-cell>
          <table:table-cell office:value-type="float" office:value="-23.2" calcext:value-type="float">
            <text:p>-23,2</text:p>
          </table:table-cell>
          <table:table-cell office:value-type="float" office:value="-33.8" calcext:value-type="float">
            <text:p>-33,8</text:p>
          </table:table-cell>
          <table:table-cell office:value-type="float" office:value="0" calcext:value-type="float">
            <text:p>0</text:p>
          </table:table-cell>
          <table:table-cell office:value-type="float" office:value="-378.12" calcext:value-type="float">
            <text:p>-378,1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65" calcext:value-type="float">
            <text:p>-71,65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413.57" calcext:value-type="float">
            <text:p>-413,57</text:p>
          </table:table-cell>
          <table:table-cell office:value-type="float" office:value="-134.07" calcext:value-type="float">
            <text:p>-134,07</text:p>
          </table:table-cell>
          <table:table-cell office:value-type="float" office:value="-29" calcext:value-type="float">
            <text:p>-29</text:p>
          </table:table-cell>
          <table:table-cell office:value-type="float" office:value="5864.48" calcext:value-type="float">
            <text:p>5864,48</text:p>
          </table:table-cell>
          <table:table-cell office:value-type="float" office:value="-65.93" calcext:value-type="float">
            <text:p>-65,93</text:p>
          </table:table-cell>
          <table:table-cell office:value-type="float" office:value="0" calcext:value-type="float">
            <text:p>0</text:p>
          </table:table-cell>
          <table:table-cell office:value-type="float" office:value="-82.4" calcext:value-type="float">
            <text:p>-82,4</text:p>
          </table:table-cell>
          <table:table-cell office:value-type="float" office:value="0" calcext:value-type="float">
            <text:p>0</text:p>
          </table:table-cell>
          <table:table-cell office:value-type="float" office:value="-368.55" calcext:value-type="float">
            <text:p>-368,55</text:p>
          </table:table-cell>
          <table:table-cell office:value-type="float" office:value="-263.91" calcext:value-type="float">
            <text:p>-263,9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4</text:p>
          </table:table-cell>
          <table:table-cell office:value-type="float" office:value="-361.96" calcext:value-type="float">
            <text:p>-361,96</text:p>
          </table:table-cell>
          <table:table-cell office:value-type="float" office:value="-291.46" calcext:value-type="float">
            <text:p>-291,46</text:p>
          </table:table-cell>
          <table:table-cell office:value-type="float" office:value="150" calcext:value-type="float">
            <text:p>150</text:p>
          </table:table-cell>
          <table:table-cell office:value-type="float" office:value="225.82" calcext:value-type="float">
            <text:p>225,82</text:p>
          </table:table-cell>
          <table:table-cell office:value-type="float" office:value="-51.94" calcext:value-type="float">
            <text:p>-51,94</text:p>
          </table:table-cell>
          <table:table-cell office:value-type="float" office:value="-1048.63" calcext:value-type="float">
            <text:p>-1048,63</text:p>
          </table:table-cell>
          <table:table-cell office:value-type="float" office:value="-6.4" calcext:value-type="float">
            <text:p>-6,4</text:p>
          </table:table-cell>
          <table:table-cell office:value-type="float" office:value="-366.72" calcext:value-type="float">
            <text:p>-366,72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,52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8" calcext:value-type="float">
            <text:p>-64,8</text:p>
          </table:table-cell>
          <table:table-cell office:value-type="float" office:value="244" calcext:value-type="float">
            <text:p>244</text:p>
          </table:table-cell>
          <table:table-cell office:value-type="float" office:value="-687.7" calcext:value-type="float">
            <text:p>-687,7</text:p>
          </table:table-cell>
          <table:table-cell office:value-type="float" office:value="0" calcext:value-type="float">
            <text:p>0</text:p>
          </table:table-cell>
          <table:table-cell office:value-type="float" office:value="-158.86" calcext:value-type="float">
            <text:p>-158,86</text:p>
          </table:table-cell>
          <table:table-cell office:value-type="float" office:value="-29" calcext:value-type="float">
            <text:p>-29</text:p>
          </table:table-cell>
          <table:table-cell office:value-type="float" office:value="2682.09" calcext:value-type="float">
            <text:p>2682,09</text:p>
          </table:table-cell>
          <table:table-cell office:value-type="float" office:value="-83.1" calcext:value-type="float">
            <text:p>-83,1</text:p>
          </table:table-cell>
          <table:table-cell office:value-type="float" office:value="0" calcext:value-type="float">
            <text:p>0</text:p>
          </table:table-cell>
          <table:table-cell office:value-type="float" office:value="-15.2" calcext:value-type="float">
            <text:p>-15,2</text:p>
          </table:table-cell>
          <table:table-cell office:value-type="float" office:value="0" calcext:value-type="float">
            <text:p>0</text:p>
          </table:table-cell>
          <table:table-cell office:value-type="float" office:value="-445.38" calcext:value-type="float">
            <text:p>-445,38</text:p>
          </table:table-cell>
          <table:table-cell office:value-type="float" office:value="-45.7" calcext:value-type="float">
            <text:p>-45,7</text:p>
          </table:table-cell>
          <table:table-cell office:value-type="float" office:value="-153.5" calcext:value-type="float">
            <text:p>-153,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4</text:p>
          </table:table-cell>
          <table:table-cell office:value-type="float" office:value="-1117.22" calcext:value-type="float">
            <text:p>-1117,22</text:p>
          </table:table-cell>
          <table:table-cell office:value-type="float" office:value="-193.96" calcext:value-type="float">
            <text:p>-193,96</text:p>
          </table:table-cell>
          <table:table-cell office:value-type="float" office:value="-20" calcext:value-type="float">
            <text:p>-20</text:p>
          </table:table-cell>
          <table:table-cell office:value-type="float" office:value="-512.13" calcext:value-type="float">
            <text:p>-512,13</text:p>
          </table:table-cell>
          <table:table-cell office:value-type="float" office:value="-14.94" calcext:value-type="float">
            <text:p>-14,94</text:p>
          </table:table-cell>
          <table:table-cell office:value-type="float" office:value="-910.84" calcext:value-type="float">
            <text:p>-910,84</text:p>
          </table:table-cell>
          <table:table-cell office:value-type="float" office:value="0" calcext:value-type="float">
            <text:p>0</text:p>
          </table:table-cell>
          <table:table-cell office:value-type="float" office:value="-160.05" calcext:value-type="float">
            <text:p>-160,05</text:p>
          </table:table-cell>
          <table:table-cell office:value-type="float" office:value="0" calcext:value-type="float">
            <text:p>0</text:p>
          </table:table-cell>
          <table:table-cell office:value-type="float" office:value="-95.35" calcext:value-type="float">
            <text:p>-95,35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45" calcext:value-type="float">
            <text:p>-145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07.23" calcext:value-type="float">
            <text:p>-107,23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0" calcext:value-type="float">
            <text:p>0</text:p>
          </table:table-cell>
          <table:table-cell office:value-type="float" office:value="-410.46" calcext:value-type="float">
            <text:p>-410,46</text:p>
          </table:table-cell>
          <table:table-cell office:value-type="float" office:value="0" calcext:value-type="float">
            <text:p>0</text:p>
          </table:table-cell>
          <table:table-cell office:value-type="float" office:value="3083.73" calcext:value-type="float">
            <text:p>3083,73</text:p>
          </table:table-cell>
          <table:table-cell office:value-type="float" office:value="15.29" calcext:value-type="float">
            <text:p>15,29</text:p>
          </table:table-cell>
          <table:table-cell office:value-type="float" office:value="0" calcext:value-type="float">
            <text:p>0</text:p>
          </table:table-cell>
          <table:table-cell office:value-type="float" office:value="-167.45" calcext:value-type="float">
            <text:p>-167,45</text:p>
          </table:table-cell>
          <table:table-cell office:value-type="float" office:value="0" calcext:value-type="float">
            <text:p>0</text:p>
          </table:table-cell>
          <table:table-cell office:value-type="float" office:value="-430.63" calcext:value-type="float">
            <text:p>-430,63</text:p>
          </table:table-cell>
          <table:table-cell office:value-type="float" office:value="-32.5" calcext:value-type="float">
            <text:p>-32,5</text:p>
          </table:table-cell>
          <table:table-cell office:value-type="float" office:value="-127" calcext:value-type="float">
            <text:p>-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24</text:p>
          </table:table-cell>
          <table:table-cell office:value-type="float" office:value="-484.1" calcext:value-type="float">
            <text:p>-484,1</text:p>
          </table:table-cell>
          <table:table-cell office:value-type="float" office:value="-90.4" calcext:value-type="float">
            <text:p>-90,4</text:p>
          </table:table-cell>
          <table:table-cell office:value-type="float" office:value="-27.5" calcext:value-type="float">
            <text:p>-27,5</text:p>
          </table:table-cell>
          <table:table-cell office:value-type="float" office:value="-402.08" calcext:value-type="float">
            <text:p>-402,08</text:p>
          </table:table-cell>
          <table:table-cell office:value-type="float" office:value="-40.54" calcext:value-type="float">
            <text:p>-40,54</text:p>
          </table:table-cell>
          <table:table-cell office:value-type="float" office:value="-813.17" calcext:value-type="float">
            <text:p>-813,17</text:p>
          </table:table-cell>
          <table:table-cell office:value-type="float" office:value="-30" calcext:value-type="float">
            <text:p>-30</text:p>
          </table:table-cell>
          <table:table-cell office:value-type="float" office:value="-985.42" calcext:value-type="float">
            <text:p>-985,42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28;7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0" calcext:value-type="float">
            <text:p>0</text:p>
          </table:table-cell>
          <table:table-cell office:value-type="float" office:value="-513.56" calcext:value-type="float">
            <text:p>-513,56</text:p>
          </table:table-cell>
          <table:table-cell office:value-type="float" office:value="-94" calcext:value-type="float">
            <text:p>-94</text:p>
          </table:table-cell>
          <table:table-cell office:value-type="float" office:value="3720.31" calcext:value-type="float">
            <text:p>3720,31</text:p>
          </table:table-cell>
          <table:table-cell office:value-type="float" office:value="-65.03" calcext:value-type="float">
            <text:p>-65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41" calcext:value-type="float">
            <text:p>-436,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il24</text:p>
          </table:table-cell>
          <table:table-cell office:value-type="float" office:value="27389.69" calcext:value-type="float">
            <text:p>27389,69</text:p>
          </table:table-cell>
          <table:table-cell office:value-type="float" office:value="-352.97" calcext:value-type="float">
            <text:p>-352,97</text:p>
          </table:table-cell>
          <table:table-cell office:value-type="float" office:value="28200" calcext:value-type="float">
            <text:p>28200</text:p>
          </table:table-cell>
          <table:table-cell office:value-type="float" office:value="-378.52" calcext:value-type="float">
            <text:p>-378,52</text:p>
          </table:table-cell>
          <table:table-cell office:value-type="float" office:value="-30.4" calcext:value-type="float">
            <text:p>-30,4</text:p>
          </table:table-cell>
          <table:table-cell office:value-type="float" office:value="-1148.06" calcext:value-type="float">
            <text:p>-1148,06</text:p>
          </table:table-cell>
          <table:table-cell office:value-type="float" office:value="0" calcext:value-type="float">
            <text:p>0</text:p>
          </table:table-cell>
          <table:table-cell office:value-type="float" office:value="-71.6" calcext:value-type="float">
            <text:p>-71,6</text:p>
          </table:table-cell>
          <table:table-cell office:value-type="float" office:value="-59.5" calcext:value-type="float">
            <text:p>-59,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office:value-type="float" office:value="61.63" calcext:value-type="float">
            <text:p>61,63</text:p>
          </table:table-cell>
          <table:table-cell office:value-type="float" office:value="-81" calcext:value-type="float">
            <text:p>-81</text:p>
          </table:table-cell>
          <table:table-cell office:value-type="float" office:value="-134.75" calcext:value-type="float">
            <text:p>-134,75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41.07" calcext:value-type="float">
            <text:p>-41,07</text:p>
          </table:table-cell>
          <table:table-cell office:value-type="float" office:value="-252.65" calcext:value-type="float">
            <text:p>-252,65</text:p>
          </table:table-cell>
          <table:table-cell office:value-type="float" office:value="-112.9" calcext:value-type="float">
            <text:p>-112,9</text:p>
          </table:table-cell>
          <table:table-cell office:value-type="float" office:value="2908.47" calcext:value-type="float">
            <text:p>2908,47</text:p>
          </table:table-cell>
          <table:table-cell office:value-type="float" office:value="-2.35" calcext:value-type="float">
            <text:p>-2,35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,5</text:p>
          </table:table-cell>
          <table:table-cell office:value-type="float" office:value="0" calcext:value-type="float">
            <text:p>0</text:p>
          </table:table-cell>
          <table:table-cell office:value-type="float" office:value="-343.88" calcext:value-type="float">
            <text:p>-343,88</text:p>
          </table:table-cell>
          <table:table-cell office:value-type="float" office:value="-97.56" calcext:value-type="float">
            <text:p>-97,5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te24</text:p>
          </table:table-cell>
          <table:table-cell office:value-type="float" office:value="-25576.94" calcext:value-type="float">
            <text:p>-25576,94</text:p>
          </table:table-cell>
          <table:table-cell office:value-type="float" office:value="-1051.27" calcext:value-type="float">
            <text:p>-1051,27</text:p>
          </table:table-cell>
          <table:table-cell office:value-type="float" office:value="-20160.4" calcext:value-type="float">
            <text:p>-20160,4</text:p>
          </table:table-cell>
          <table:table-cell office:value-type="float" office:value="-927.88" calcext:value-type="float">
            <text:p>-927,88</text:p>
          </table:table-cell>
          <table:table-cell office:value-type="float" office:value="-23.06" calcext:value-type="float">
            <text:p>-23,06</text:p>
          </table:table-cell>
          <table:table-cell office:value-type="float" office:value="-2697.84" calcext:value-type="float">
            <text:p>-2697,84</text:p>
          </table:table-cell>
          <table:table-cell office:value-type="float" office:value="-44.99" calcext:value-type="float">
            <text:p>-44,99</text:p>
          </table:table-cell>
          <table:table-cell office:value-type="float" office:value="-170.56" calcext:value-type="float">
            <text:p>-170,56</text:p>
          </table:table-cell>
          <table:table-cell office:value-type="float" office:value="0" calcext:value-type="float">
            <text:p>0</text:p>
          </table:table-cell>
          <table:table-cell office:value-type="float" office:value="-2000.02" calcext:value-type="float">
            <text:p>-2000,02</text:p>
          </table:table-cell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14.4" calcext:value-type="float">
            <text:p>-14,4</text:p>
          </table:table-cell>
          <table:table-cell office:value-type="float" office:value="-1025.24" calcext:value-type="float">
            <text:p>-1025,24</text:p>
          </table:table-cell>
          <table:table-cell office:value-type="float" office:value="-171.35" calcext:value-type="float">
            <text:p>-171,35</text:p>
          </table:table-cell>
          <table:table-cell office:value-type="float" office:value="854" calcext:value-type="float">
            <text:p>854</text:p>
          </table:table-cell>
          <table:table-cell office:value-type="float" office:value="-3276.35" calcext:value-type="float">
            <text:p>-3276,35</text:p>
          </table:table-cell>
          <table:table-cell office:value-type="float" office:value="-831.6" calcext:value-type="float">
            <text:p>-831,6</text:p>
          </table:table-cell>
          <table:table-cell office:value-type="float" office:value="-1571.85" calcext:value-type="float">
            <text:p>-1571,85</text:p>
          </table:table-cell>
          <table:table-cell office:value-type="float" office:value="-556.55" calcext:value-type="float">
            <text:p>-556,55</text:p>
          </table:table-cell>
          <table:table-cell office:value-type="float" office:value="9943.56" calcext:value-type="float">
            <text:p>9943,56</text:p>
          </table:table-cell>
          <table:table-cell office:value-type="float" office:value="-257.01" calcext:value-type="float">
            <text:p>-257,01</text:p>
          </table:table-cell>
          <table:table-cell office:value-type="float" office:value="0" calcext:value-type="float">
            <text:p>0</text:p>
          </table:table-cell>
          <table:table-cell office:value-type="float" office:value="-216.4" calcext:value-type="float">
            <text:p>-216,4</text:p>
          </table:table-cell>
          <table:table-cell office:value-type="float" office:value="0" calcext:value-type="float">
            <text:p>0</text:p>
          </table:table-cell>
          <table:table-cell office:value-type="float" office:value="-236.65" calcext:value-type="float">
            <text:p>-236,65</text:p>
          </table:table-cell>
          <table:table-cell office:value-type="float" office:value="-320.1" calcext:value-type="float">
            <text:p>-320,1</text:p>
          </table:table-cell>
          <table:table-cell office:value-type="float" office:value="-400.98" calcext:value-type="float">
            <text:p>-400,9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out24</text:p>
          </table:table-cell>
          <table:table-cell office:value-type="float" office:value="-1025.28" calcext:value-type="float">
            <text:p>-1025,28</text:p>
          </table:table-cell>
          <table:table-cell office:value-type="float" office:value="-325.31" calcext:value-type="float">
            <text:p>-325,31</text:p>
          </table:table-cell>
          <table:table-cell office:value-type="float" office:value="-36" calcext:value-type="float">
            <text:p>-36</text:p>
          </table:table-cell>
          <table:table-cell office:value-type="float" office:value="-411.41" calcext:value-type="float">
            <text:p>-411,41</text:p>
          </table:table-cell>
          <table:table-cell office:value-type="float" office:value="-6.01" calcext:value-type="float">
            <text:p>-6,01</text:p>
          </table:table-cell>
          <table:table-cell office:value-type="float" office:value="-553.36" calcext:value-type="float">
            <text:p>-553,36</text:p>
          </table:table-cell>
          <table:table-cell office:value-type="float" office:value="-30.95" calcext:value-type="float">
            <text:p>-30,95</text:p>
          </table:table-cell>
          <table:table-cell office:value-type="float" office:value="0" calcext:value-type="float">
            <text:p>0</text:p>
          </table:table-cell>
          <table:table-cell office:value-type="float" office:value="-155.45" calcext:value-type="float">
            <text:p>-155,45</text:p>
          </table:table-cell>
          <table:table-cell office:value-type="float" office:value="-39.11" calcext:value-type="float">
            <text:p>-39,11</text:p>
          </table:table-cell>
          <table:table-cell office:value-type="float" office:value="0" calcext:value-type="float">
            <text:p>0</text:p>
          </table:table-cell>
          <table:table-cell office:value-type="float" office:value="-9.27" calcext:value-type="float">
            <text:p>-9,27</text:p>
          </table:table-cell>
          <table:table-cell office:value-type="float" office:value="-100" calcext:value-type="float">
            <text:p>-100</text:p>
          </table:table-cell>
          <table:table-cell office:value-type="float" office:value="14.4" calcext:value-type="float">
            <text:p>14,4</text:p>
          </table:table-cell>
          <table:table-cell office:value-type="float" office:value="-20.5" calcext:value-type="float">
            <text:p>-20,5</text:p>
          </table:table-cell>
          <table:table-cell office:value-type="float" office:value="-40.25" calcext:value-type="float">
            <text:p>-40,25</text:p>
          </table:table-cell>
          <table:table-cell office:value-type="float" office:value="0" calcext:value-type="float">
            <text:p>0</text:p>
          </table:table-cell>
          <table:table-cell office:value-type="float" office:value="-1185.14" calcext:value-type="float">
            <text:p>-1185,14</text:p>
          </table:table-cell>
          <table:table-cell office:value-type="float" office:value="0" calcext:value-type="float">
            <text:p>0</text:p>
          </table:table-cell>
          <table:table-cell office:value-type="float" office:value="-171.38" calcext:value-type="float">
            <text:p>-171,38</text:p>
          </table:table-cell>
          <table:table-cell office:value-type="float" office:value="-36.65" calcext:value-type="float">
            <text:p>-36,65</text:p>
          </table:table-cell>
          <table:table-cell office:value-type="float" office:value="3020.59" calcext:value-type="float">
            <text:p>3020,59</text:p>
          </table:table-cell>
          <table:table-cell office:value-type="float" office:value="-1.85" calcext:value-type="float">
            <text:p>-1,85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-16" calcext:value-type="float">
            <text:p>-16</text:p>
          </table:table-cell>
          <table:table-cell office:value-type="float" office:value="-130.5" calcext:value-type="float">
            <text:p>-130,5</text:p>
          </table:table-cell>
          <table:table-cell office:value-type="float" office:value="-633.83" calcext:value-type="float">
            <text:p>-633,83</text:p>
          </table:table-cell>
          <table:table-cell office:value-type="float" office:value="-55.3" calcext:value-type="float">
            <text:p>-55,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pt24</text:p>
          </table:table-cell>
          <table:table-cell office:value-type="float" office:value="194.81" calcext:value-type="float">
            <text:p>194,81</text:p>
          </table:table-cell>
          <table:table-cell office:value-type="float" office:value="-293.93" calcext:value-type="float">
            <text:p>-293,93</text:p>
          </table:table-cell>
          <table:table-cell office:value-type="float" office:value="150" calcext:value-type="float">
            <text:p>150</text:p>
          </table:table-cell>
          <table:table-cell office:value-type="float" office:value="-530.37" calcext:value-type="float">
            <text:p>-530,37</text:p>
          </table:table-cell>
          <table:table-cell office:value-type="float" office:value="-5.8" calcext:value-type="float">
            <text:p>-5,8</text:p>
          </table:table-cell>
          <table:table-cell office:value-type="float" office:value="-803.52" calcext:value-type="float">
            <text:p>-803,52</text:p>
          </table:table-cell>
          <table:table-cell office:value-type="float" office:value="-100.01" calcext:value-type="float">
            <text:p>-100,01</text:p>
          </table:table-cell>
          <table:table-cell office:value-type="float" office:value="-899.85" calcext:value-type="float">
            <text:p>-899,85</text:p>
          </table:table-cell>
          <table:table-cell office:value-type="float" office:value="0" calcext:value-type="float">
            <text:p>0</text:p>
          </table:table-cell>
          <table:table-cell office:value-type="float" office:value="-61.53" calcext:value-type="float">
            <text:p>-61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8" calcext:value-type="float">
            <text:p>-58,8</text:p>
          </table:table-cell>
          <table:table-cell office:value-type="float" office:value="0" calcext:value-type="float">
            <text:p>0</text:p>
          </table:table-cell>
          <table:table-cell office:value-type="float" office:value="-775.97" calcext:value-type="float">
            <text:p>-775,97</text:p>
          </table:table-cell>
          <table:table-cell office:value-type="float" office:value="-53.7" calcext:value-type="float">
            <text:p>-53,7</text:p>
          </table:table-cell>
          <table:table-cell office:value-type="float" office:value="-177.58" calcext:value-type="float">
            <text:p>-177,58</text:p>
          </table:table-cell>
          <table:table-cell office:value-type="float" office:value="-81.4" calcext:value-type="float">
            <text:p>-81,4</text:p>
          </table:table-cell>
          <table:table-cell office:value-type="float" office:value="4659.19" calcext:value-type="float">
            <text:p>4659,19</text:p>
          </table:table-cell>
          <table:table-cell office:value-type="float" office:value="-222.83" calcext:value-type="float">
            <text:p>-222,83</text:p>
          </table:table-cell>
          <table:table-cell office:value-type="float" office:value="0" calcext:value-type="float">
            <text:p>0</text:p>
          </table:table-cell>
          <table:table-cell office:value-type="float" office:value="-26.1" calcext:value-type="float">
            <text:p>-26,1</text:p>
          </table:table-cell>
          <table:table-cell office:value-type="float" office:value="-80.29" calcext:value-type="float">
            <text:p>-80,29</text:p>
          </table:table-cell>
          <table:table-cell office:value-type="float" office:value="-232.71" calcext:value-type="float">
            <text:p>-232,71</text:p>
          </table:table-cell>
          <table:table-cell office:value-type="float" office:value="0" calcext:value-type="float">
            <text:p>0</text:p>
          </table:table-cell>
          <table:table-cell office:value-type="float" office:value="-59.99" calcext:value-type="float">
            <text:p>-59,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4</text:p>
          </table:table-cell>
          <table:table-cell office:value-type="float" office:value="-624.37" calcext:value-type="float">
            <text:p>-624,37</text:p>
          </table:table-cell>
          <table:table-cell office:value-type="float" office:value="-291.93" calcext:value-type="float">
            <text:p>-291,93</text:p>
          </table:table-cell>
          <table:table-cell office:value-type="float" office:value="-59.99" calcext:value-type="float">
            <text:p>-59,99</text:p>
          </table:table-cell>
          <table:table-cell office:value-type="float" office:value="-500.59" calcext:value-type="float">
            <text:p>-500,59</text:p>
          </table:table-cell>
          <table:table-cell office:value-type="float" office:value="-42.89" calcext:value-type="float">
            <text:p>-42,89</text:p>
          </table:table-cell>
          <table:table-cell office:value-type="float" office:value="-982.35" calcext:value-type="float">
            <text:p>-982,35</text:p>
          </table:table-cell>
          <table:table-cell office:value-type="float" office:value="-96.26" calcext:value-type="float">
            <text:p>-96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25" calcext:value-type="float">
            <text:p>-48,25</text:p>
          </table:table-cell>
          <table:table-cell office:value-type="float" office:value="0" calcext:value-type="float">
            <text:p>0</text:p>
          </table:table-cell>
          <table:table-cell office:value-type="float" office:value="-1575.94" calcext:value-type="float">
            <text:p>-1575,94</text:p>
          </table:table-cell>
          <table:table-cell office:value-type="float" office:value="-478.29" calcext:value-type="float">
            <text:p>-478,29</text:p>
          </table:table-cell>
          <table:table-cell office:value-type="float" office:value="-339.17" calcext:value-type="float">
            <text:p>-339,17</text:p>
          </table:table-cell>
          <table:table-cell office:value-type="float" office:value="-95.75" calcext:value-type="float">
            <text:p>-95,75</text:p>
          </table:table-cell>
          <table:table-cell office:value-type="float" office:value="5055.22" calcext:value-type="float">
            <text:p>5055,22</text:p>
          </table:table-cell>
          <table:table-cell office:value-type="float" office:value="-63.5" calcext:value-type="float">
            <text:p>-63,5</text:p>
          </table:table-cell>
          <table:table-cell office:value-type="float" office:value="0" calcext:value-type="float">
            <text:p>0</text:p>
          </table:table-cell>
          <table:table-cell office:value-type="float" office:value="-53.5" calcext:value-type="float">
            <text:p>-53,5</text:p>
          </table:table-cell>
          <table:table-cell office:value-type="float" office:value="-166.99" calcext:value-type="float">
            <text:p>-166,99</text:p>
          </table:table-cell>
          <table:table-cell office:value-type="float" office:value="-252.14" calcext:value-type="float">
            <text:p>-252,14</text:p>
          </table:table-cell>
          <table:table-cell office:value-type="float" office:value="-474.05" calcext:value-type="float">
            <text:p>-474,0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4</text:p>
          </table:table-cell>
          <table:table-cell office:value-type="float" office:value="-2259.21" calcext:value-type="float">
            <text:p>-2259,21</text:p>
          </table:table-cell>
          <table:table-cell office:value-type="float" office:value="-2.11" calcext:value-type="float">
            <text:p>-2,11</text:p>
          </table:table-cell>
          <table:table-cell office:value-type="float" office:value="-320" calcext:value-type="float">
            <text:p>-320</text:p>
          </table:table-cell>
          <table:table-cell office:value-type="float" office:value="-535.85" calcext:value-type="float">
            <text:p>-535,85</text:p>
          </table:table-cell>
          <table:table-cell office:value-type="float" office:value="-4.9" calcext:value-type="float">
            <text:p>-4,9</text:p>
          </table:table-cell>
          <table:table-cell office:value-type="float" office:value="-901.51" calcext:value-type="float">
            <text:p>-901,51</text:p>
          </table:table-cell>
          <table:table-cell office:value-type="float" office:value="-139.5" calcext:value-type="float">
            <text:p>-139,5</text:p>
          </table:table-cell>
          <table:table-cell office:value-type="float" office:value="0" calcext:value-type="float">
            <text:p>0</text:p>
          </table:table-cell>
          <table:table-cell office:value-type="float" office:value="-69.2" calcext:value-type="float">
            <text:p>-69,2</text:p>
          </table:table-cell>
          <table:table-cell office:value-type="float" office:value="-173.83" calcext:value-type="float">
            <text:p>-173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7" calcext:value-type="float">
            <text:p>-36,7</text:p>
          </table:table-cell>
          <table:table-cell office:value-type="float" office:value="0" calcext:value-type="float">
            <text:p>0</text:p>
          </table:table-cell>
          <table:table-cell office:value-type="float" office:value="-775.97" calcext:value-type="float">
            <text:p>-775,97</text:p>
          </table:table-cell>
          <table:table-cell office:value-type="float" office:value="-3.95" calcext:value-type="float">
            <text:p>-3,95</text:p>
          </table:table-cell>
          <table:table-cell office:value-type="float" office:value="-366.87" calcext:value-type="float">
            <text:p>-366,87</text:p>
          </table:table-cell>
          <table:table-cell office:value-type="float" office:value="-75.3" calcext:value-type="float">
            <text:p>-75,3</text:p>
          </table:table-cell>
          <table:table-cell office:value-type="float" office:value="2032.85" calcext:value-type="float">
            <text:p>2032,85</text:p>
          </table:table-cell>
          <table:table-cell office:value-type="float" office:value="-111.16" calcext:value-type="float">
            <text:p>-111,16</text:p>
          </table:table-cell>
          <table:table-cell office:value-type="float" office:value="0" calcext:value-type="float">
            <text:p>0</text:p>
          </table:table-cell>
          <table:table-cell office:value-type="float" office:value="-148.7" calcext:value-type="float">
            <text:p>-148,7</text:p>
          </table:table-cell>
          <table:table-cell office:value-type="float" office:value="-85.99" calcext:value-type="float">
            <text:p>-85,99</text:p>
          </table:table-cell>
          <table:table-cell office:value-type="float" office:value="-224.52" calcext:value-type="float">
            <text:p>-224,52</text:p>
          </table:table-cell>
          <table:table-cell office:value-type="float" office:value="0" calcext:value-type="float">
            <text:p>0</text:p>
          </table:table-cell>
          <table:table-cell table:formula="of:=-129-87" office:value-type="float" office:value="-216" calcext:value-type="float">
            <text:p>-2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4</text:p>
          </table:table-cell>
          <table:table-cell office:value-type="string" calcext:value-type="string">
            <text:p>2395.17</text:p>
          </table:table-cell>
          <table:table-cell office:value-type="float" office:value="-202.96" calcext:value-type="float">
            <text:p>-202,96</text:p>
          </table:table-cell>
          <table:table-cell office:value-type="float" office:value="1462.17" calcext:value-type="float">
            <text:p>1462,17</text:p>
          </table:table-cell>
          <table:table-cell office:value-type="float" office:value="-452.03" calcext:value-type="float">
            <text:p>-452,03</text:p>
          </table:table-cell>
          <table:table-cell office:value-type="float" office:value="149.55" calcext:value-type="float">
            <text:p>149,55</text:p>
          </table:table-cell>
          <table:table-cell office:value-type="float" office:value="-494.91" calcext:value-type="float">
            <text:p>-494,91</text:p>
          </table:table-cell>
          <table:table-cell office:value-type="float" office:value="-17.35" calcext:value-type="float">
            <text:p>-17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.21" calcext:value-type="float">
            <text:p>-223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  <table:table-cell office:value-type="float" office:value="-157.4" calcext:value-type="float">
            <text:p>-157,4</text:p>
          </table:table-cell>
          <table:table-cell office:value-type="float" office:value="0" calcext:value-type="float">
            <text:p>0</text:p>
          </table:table-cell>
          <table:table-cell office:value-type="float" office:value="-775.97" calcext:value-type="float">
            <text:p>-775,97</text:p>
          </table:table-cell>
          <table:table-cell office:value-type="float" office:value="-102" calcext:value-type="float">
            <text:p>-102</text:p>
          </table:table-cell>
          <table:table-cell office:value-type="float" office:value="-106.14" calcext:value-type="float">
            <text:p>-106,14</text:p>
          </table:table-cell>
          <table:table-cell office:value-type="float" office:value="-104.7" calcext:value-type="float">
            <text:p>-104,7</text:p>
          </table:table-cell>
          <table:table-cell office:value-type="float" office:value="4413.49" calcext:value-type="float">
            <text:p>4413,49</text:p>
          </table:table-cell>
          <table:table-cell office:value-type="float" office:value="-164.35" calcext:value-type="float">
            <text:p>-164,35</text:p>
          </table:table-cell>
          <table:table-cell office:value-type="float" office:value="0" calcext:value-type="float">
            <text:p>0</text:p>
          </table:table-cell>
          <table:table-cell office:value-type="float" office:value="-43.72" calcext:value-type="float">
            <text:p>-43,72</text:p>
          </table:table-cell>
          <table:table-cell office:value-type="float" office:value="-106.98" calcext:value-type="float">
            <text:p>-106,98</text:p>
          </table:table-cell>
          <table:table-cell office:value-type="float" office:value="-382.91" calcext:value-type="float">
            <text:p>-382,91</text:p>
          </table:table-cell>
          <table:table-cell office:value-type="float" office:value="-108.31" calcext:value-type="float">
            <text:p>-108,3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5</text:p>
          </table:table-cell>
          <table:table-cell office:value-type="float" office:value="-227.7" calcext:value-type="float">
            <text:p>-227,7</text:p>
          </table:table-cell>
          <table:table-cell office:value-type="float" office:value="-253.96" calcext:value-type="float">
            <text:p>-253,96</text:p>
          </table:table-cell>
          <table:table-cell office:value-type="float" office:value="-20" calcext:value-type="float">
            <text:p>-20</text:p>
          </table:table-cell>
          <table:table-cell office:value-type="float" office:value="-339.98" calcext:value-type="float">
            <text:p>-339,98</text:p>
          </table:table-cell>
          <table:table-cell office:value-type="float" office:value="-37.89" calcext:value-type="float">
            <text:p>-37,89</text:p>
          </table:table-cell>
          <table:table-cell office:value-type="float" office:value="-933.65" calcext:value-type="float">
            <text:p>-933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62" calcext:value-type="float">
            <text:p>-80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office:value-type="float" office:value="132.79" calcext:value-type="float">
            <text:p>132,79</text:p>
          </table:table-cell>
          <table:table-cell office:value-type="float" office:value="-451.99" calcext:value-type="float">
            <text:p>-451,99</text:p>
          </table:table-cell>
          <table:table-cell office:value-type="float" office:value="-80.19" calcext:value-type="float">
            <text:p>-80,19</text:p>
          </table:table-cell>
          <table:table-cell office:value-type="float" office:value="1153" calcext:value-type="float">
            <text:p>1153</text:p>
          </table:table-cell>
          <table:table-cell office:value-type="float" office:value="-873.15" calcext:value-type="float">
            <text:p>-873,15</text:p>
          </table:table-cell>
          <table:table-cell office:value-type="float" office:value="0" calcext:value-type="float">
            <text:p>0</text:p>
          </table:table-cell>
          <table:table-cell office:value-type="float" office:value="-240.16" calcext:value-type="float">
            <text:p>-240,16</text:p>
          </table:table-cell>
          <table:table-cell office:value-type="float" office:value="-73.2" calcext:value-type="float">
            <text:p>-73,2</text:p>
          </table:table-cell>
          <table:table-cell office:value-type="float" office:value="2879.17" calcext:value-type="float">
            <text:p>2879,17</text:p>
          </table:table-cell>
          <table:table-cell office:value-type="float" office:value="-202.92" calcext:value-type="float">
            <text:p>-202,92</text:p>
          </table:table-cell>
          <table:table-cell office:value-type="float" office:value="0" calcext:value-type="float">
            <text:p>0</text:p>
          </table:table-cell>
          <table:table-cell office:value-type="float" office:value="-73.5" calcext:value-type="float">
            <text:p>-73,5</text:p>
          </table:table-cell>
          <table:table-cell office:value-type="float" office:value="-86.99" calcext:value-type="float">
            <text:p>-86,99</text:p>
          </table:table-cell>
          <table:table-cell office:value-type="float" office:value="-269.58" calcext:value-type="float">
            <text:p>-269,58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5</text:p>
          </table:table-cell>
          <table:table-cell office:value-type="float" office:value="-2444.38" calcext:value-type="float">
            <text:p>-2444,38</text:p>
          </table:table-cell>
          <table:table-cell office:value-type="float" office:value="-252.96" calcext:value-type="float">
            <text:p>-252,96</text:p>
          </table:table-cell>
          <table:table-cell office:value-type="float" office:value="-20" calcext:value-type="float">
            <text:p>-20</text:p>
          </table:table-cell>
          <table:table-cell office:value-type="float" office:value="-1169.96" calcext:value-type="float">
            <text:p>-1169,96</text:p>
          </table:table-cell>
          <table:table-cell office:value-type="float" office:value="-5.04" calcext:value-type="float">
            <text:p>-5,04</text:p>
          </table:table-cell>
          <table:table-cell office:value-type="float" office:value="-1030.79" calcext:value-type="float">
            <text:p>-1030,79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252.15" calcext:value-type="float">
            <text:p>-252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.7" calcext:value-type="float">
            <text:p>-167,7</text:p>
          </table:table-cell>
          <table:table-cell office:value-type="float" office:value="0" calcext:value-type="float">
            <text:p>0</text:p>
          </table:table-cell>
          <table:table-cell office:value-type="float" office:value="-785.15" calcext:value-type="float">
            <text:p>-785,15</text:p>
          </table:table-cell>
          <table:table-cell office:value-type="float" office:value="0" calcext:value-type="float">
            <text:p>0</text:p>
          </table:table-cell>
          <table:table-cell office:value-type="float" office:value="-390.59" calcext:value-type="float">
            <text:p>-390,59</text:p>
          </table:table-cell>
          <table:table-cell office:value-type="float" office:value="-48.1" calcext:value-type="float">
            <text:p>-48,1</text:p>
          </table:table-cell>
          <table:table-cell office:value-type="float" office:value="2930" calcext:value-type="float">
            <text:p>2930</text:p>
          </table:table-cell>
          <table:table-cell office:value-type="float" office:value="-107.56" calcext:value-type="float">
            <text:p>-107,56</text:p>
          </table:table-cell>
          <table:table-cell office:value-type="float" office:value="-50.97" calcext:value-type="float">
            <text:p>-50,97</text:p>
          </table:table-cell>
          <table:table-cell office:value-type="float" office:value="-48.61" calcext:value-type="float">
            <text:p>-48,61</text:p>
          </table:table-cell>
          <table:table-cell office:value-type="float" office:value="-86.99" calcext:value-type="float">
            <text:p>-86,99</text:p>
          </table:table-cell>
          <table:table-cell office:value-type="float" office:value="-626.45" calcext:value-type="float">
            <text:p>-626,45</text:p>
          </table:table-cell>
          <table:table-cell office:value-type="float" office:value="0" calcext:value-type="float">
            <text:p>0</text:p>
          </table:table-cell>
          <table:table-cell office:value-type="float" office:value="-172.36" calcext:value-type="float">
            <text:p>-172,3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25</text:p>
          </table:table-cell>
          <table:table-cell office:value-type="float" office:value="-90.28" calcext:value-type="float">
            <text:p>-90,28</text:p>
          </table:table-cell>
          <table:table-cell office:value-type="float" office:value="-216.69" calcext:value-type="float">
            <text:p>-216,69</text:p>
          </table:table-cell>
          <table:table-cell/>
          <table:table-cell office:value-type="float" office:value="194.35" calcext:value-type="float">
            <text:p>194,35</text:p>
          </table:table-cell>
          <table:table-cell office:value-type="float" office:value="-13.05" calcext:value-type="float">
            <text:p>-13,05</text:p>
          </table:table-cell>
          <table:table-cell office:value-type="float" office:value="-1039.79" calcext:value-type="float">
            <text:p>-1039,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74" calcext:value-type="float">
            <text:p>-221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4" calcext:value-type="float">
            <text:p>-85,4</text:p>
          </table:table-cell>
          <table:table-cell office:value-type="float" office:value="0" calcext:value-type="float">
            <text:p>0</text:p>
          </table:table-cell>
          <table:table-cell office:value-type="float" office:value="-761.66" calcext:value-type="float">
            <text:p>-761,66</text:p>
          </table:table-cell>
          <table:table-cell office:value-type="float" office:value="-306.87" calcext:value-type="float">
            <text:p>-306,87</text:p>
          </table:table-cell>
          <table:table-cell office:value-type="float" office:value="-206.61" calcext:value-type="float">
            <text:p>-206,61</text:p>
          </table:table-cell>
          <table:table-cell office:value-type="float" office:value="0" calcext:value-type="float">
            <text:p>0</text:p>
          </table:table-cell>
          <table:table-cell office:value-type="float" office:value="3337.78" calcext:value-type="float">
            <text:p>3337,78</text:p>
          </table:table-cell>
          <table:table-cell office:value-type="float" office:value="-209.17" calcext:value-type="float">
            <text:p>-209,17</text:p>
          </table:table-cell>
          <table:table-cell office:value-type="float" office:value="-33.97" calcext:value-type="float">
            <text:p>-33,97</text:p>
          </table:table-cell>
          <table:table-cell office:value-type="float" office:value="-4.5" calcext:value-type="float">
            <text:p>-4,5</text:p>
          </table:table-cell>
          <table:table-cell office:value-type="float" office:value="-139.99" calcext:value-type="float">
            <text:p>-139,99</text:p>
          </table:table-cell>
          <table:table-cell office:value-type="float" office:value="-102.74" calcext:value-type="float">
            <text:p>-102,74</text:p>
          </table:table-cell>
          <table:table-cell office:value-type="float" office:value="0" calcext:value-type="float">
            <text:p>0</text:p>
          </table:table-cell>
          <table:table-cell office:value-type="float" office:value="-119.96" calcext:value-type="float">
            <text:p>-119,9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25</text:p>
          </table:table-cell>
          <table:table-cell office:value-type="float" office:value="1200.4" calcext:value-type="float">
            <text:p>1200,4</text:p>
          </table:table-cell>
          <table:table-cell office:value-type="float" office:value="-981.42" calcext:value-type="float">
            <text:p>-981,42</text:p>
          </table:table-cell>
          <table:table-cell office:value-type="float" office:value="-3.5" calcext:value-type="float">
            <text:p>-3,5</text:p>
          </table:table-cell>
          <table:table-cell office:value-type="float" office:value="243.43" calcext:value-type="float">
            <text:p>243,43</text:p>
          </table:table-cell>
          <table:table-cell office:value-type="float" office:value="-41.49" calcext:value-type="float">
            <text:p>-41,49</text:p>
          </table:table-cell>
          <table:table-cell office:value-type="float" office:value="-476.1" calcext:value-type="float">
            <text:p>-476,1</text:p>
          </table:table-cell>
          <table:table-cell office:value-type="float" office:value="-106.89" calcext:value-type="float">
            <text:p>-106,89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,5</text:p>
          </table:table-cell>
          <table:table-cell office:value-type="float" office:value="-258.07" calcext:value-type="float">
            <text:p>-258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5" calcext:value-type="float">
            <text:p>-101,5</text:p>
          </table:table-cell>
          <table:table-cell office:value-type="float" office:value="0" calcext:value-type="float">
            <text:p>0</text:p>
          </table:table-cell>
          <table:table-cell office:value-type="float" office:value="-771.08" calcext:value-type="float">
            <text:p>-771,08</text:p>
          </table:table-cell>
          <table:table-cell office:value-type="float" office:value="-225.98" calcext:value-type="float">
            <text:p>-225,98</text:p>
          </table:table-cell>
          <table:table-cell office:value-type="float" office:value="-647.45" calcext:value-type="float">
            <text:p>-647,45</text:p>
          </table:table-cell>
          <table:table-cell office:value-type="float" office:value="-114.3" calcext:value-type="float">
            <text:p>-114,3</text:p>
          </table:table-cell>
          <table:table-cell office:value-type="float" office:value="5646.82" calcext:value-type="float">
            <text:p>5646,82</text:p>
          </table:table-cell>
          <table:table-cell office:value-type="float" office:value="-168.26" calcext:value-type="float">
            <text:p>-168,26</text:p>
          </table:table-cell>
          <table:table-cell office:value-type="float" office:value="-55.96" calcext:value-type="float">
            <text:p>-55,96</text:p>
          </table:table-cell>
          <table:table-cell office:value-type="float" office:value="-81.7" calcext:value-type="float">
            <text:p>-81,7</text:p>
          </table:table-cell>
          <table:table-cell office:value-type="float" office:value="-86.99" calcext:value-type="float">
            <text:p>-86,99</text:p>
          </table:table-cell>
          <table:table-cell office:value-type="float" office:value="-228.2" calcext:value-type="float">
            <text:p>-228,2</text:p>
          </table:table-cell>
          <table:table-cell office:value-type="float" office:value="-70.16" calcext:value-type="float">
            <text:p>-70,16</text:p>
          </table:table-cell>
          <table:table-cell office:value-type="float" office:value="-18.3" calcext:value-type="float">
            <text:p>-18,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i25</text:p>
          </table:table-cell>
          <table:table-cell office:value-type="float" office:value="-541.93" calcext:value-type="float">
            <text:p>-541,93</text:p>
          </table:table-cell>
          <table:table-cell office:value-type="float" office:value="-415.85" calcext:value-type="float">
            <text:p>-415,85</text:p>
          </table:table-cell>
          <table:table-cell office:value-type="float" office:value="-9.5" calcext:value-type="float">
            <text:p>-9,5</text:p>
          </table:table-cell>
          <table:table-cell office:value-type="float" office:value="-249.02" calcext:value-type="float">
            <text:p>-249,02</text:p>
          </table:table-cell>
          <table:table-cell office:value-type="float" office:value="-5.04" calcext:value-type="float">
            <text:p>-5,04</text:p>
          </table:table-cell>
          <table:table-cell office:value-type="float" office:value="-1076.65" calcext:value-type="float">
            <text:p>-1076,65</text:p>
          </table:table-cell>
          <table:table-cell office:value-type="float" office:value="-141.8" calcext:value-type="float">
            <text:p>-14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.36" calcext:value-type="float">
            <text:p>-179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7" calcext:value-type="float">
            <text:p>-77,7</text:p>
          </table:table-cell>
          <table:table-cell office:value-type="float" office:value="0" calcext:value-type="float">
            <text:p>0</text:p>
          </table:table-cell>
          <table:table-cell office:value-type="float" office:value="-770.79" calcext:value-type="float">
            <text:p>-770,79</text:p>
          </table:table-cell>
          <table:table-cell office:value-type="float" office:value="0" calcext:value-type="float">
            <text:p>0</text:p>
          </table:table-cell>
          <table:table-cell office:value-type="float" office:value="-126.5" calcext:value-type="float">
            <text:p>-126,5</text:p>
          </table:table-cell>
          <table:table-cell office:value-type="float" office:value="0" calcext:value-type="float">
            <text:p>0</text:p>
          </table:table-cell>
          <table:table-cell office:value-type="float" office:value="3203.87" calcext:value-type="float">
            <text:p>3203,87</text:p>
          </table:table-cell>
          <table:table-cell office:value-type="float" office:value="-94.15" calcext:value-type="float">
            <text:p>-94,15</text:p>
          </table:table-cell>
          <table:table-cell office:value-type="float" office:value="-44.96" calcext:value-type="float">
            <text:p>-44,96</text:p>
          </table:table-cell>
          <table:table-cell office:value-type="float" office:value="-126" calcext:value-type="float">
            <text:p>-126</text:p>
          </table:table-cell>
          <table:table-cell office:value-type="float" office:value="-130.98" calcext:value-type="float">
            <text:p>-130,98</text:p>
          </table:table-cell>
          <table:table-cell office:value-type="float" office:value="-97.5" calcext:value-type="float">
            <text:p>-97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2:.B47])" office:value-type="float" office:value="9341.01" calcext:value-type="float">
            <text:p>9341,01</text:p>
          </table:table-cell>
          <table:table-cell table:formula="of:=SUM([.C2:.C47])" office:value-type="float" office:value="-10086.23" calcext:value-type="float">
            <text:p>-10086,23</text:p>
          </table:table-cell>
          <table:table-cell table:formula="of:=SUM([.D2:.D47])" office:value-type="float" office:value="9135.84" calcext:value-type="float">
            <text:p>9135,84</text:p>
          </table:table-cell>
          <table:table-cell table:formula="of:=SUM([.E2:.E47])" office:value-type="float" office:value="-10133.1" calcext:value-type="float">
            <text:p>-10133,1</text:p>
          </table:table-cell>
          <table:table-cell table:formula="of:=SUM([.F2:.F47])" office:value-type="float" office:value="-3748.69" calcext:value-type="float">
            <text:p>-3748,69</text:p>
          </table:table-cell>
          <table:table-cell table:formula="of:=SUM([.G2:.G47])" office:value-type="float" office:value="-35745.86" calcext:value-type="float">
            <text:p>-35745,86</text:p>
          </table:table-cell>
          <table:table-cell table:formula="of:=SUM([.H2:.H47])" office:value-type="float" office:value="4380.38" calcext:value-type="float">
            <text:p>4380,38</text:p>
          </table:table-cell>
          <table:table-cell table:formula="of:=SUM([.I2:.I47])" office:value-type="float" office:value="-4252.71" calcext:value-type="float">
            <text:p>-4252,71</text:p>
          </table:table-cell>
          <table:table-cell table:formula="of:=SUM([.J2:.J47])" office:value-type="float" office:value="-573.15" calcext:value-type="float">
            <text:p>-573,15</text:p>
          </table:table-cell>
          <table:table-cell table:formula="of:=SUM([.K2:.K47])" office:value-type="float" office:value="-8310.22" calcext:value-type="float">
            <text:p>-8310,22</text:p>
          </table:table-cell>
          <table:table-cell table:formula="of:=SUM([.L2:.L47])" office:value-type="float" office:value="-770" calcext:value-type="float">
            <text:p>-770</text:p>
          </table:table-cell>
          <table:table-cell table:formula="of:=SUM([.M2:.M47])" office:value-type="float" office:value="-291.11" calcext:value-type="float">
            <text:p>-291,11</text:p>
          </table:table-cell>
          <table:table-cell table:formula="of:=SUM([.N2:.N47])" office:value-type="float" office:value="-3385" calcext:value-type="float">
            <text:p>-3385</text:p>
          </table:table-cell>
          <table:table-cell table:formula="of:=SUM([.O2:.O47])" office:value-type="float" office:value="-119.19" calcext:value-type="float">
            <text:p>-119,19</text:p>
          </table:table-cell>
          <table:table-cell table:formula="of:=SUM([.P2:.P47])" office:value-type="float" office:value="-3081.82" calcext:value-type="float">
            <text:p>-3081,82</text:p>
          </table:table-cell>
          <table:table-cell table:formula="of:=SUM([.Q2:.Q47])" office:value-type="float" office:value="-2374.55" calcext:value-type="float">
            <text:p>-2374,55</text:p>
          </table:table-cell>
          <table:table-cell table:formula="of:=SUM([.R2:.R47])" office:value-type="float" office:value="984" calcext:value-type="float">
            <text:p>984</text:p>
          </table:table-cell>
          <table:table-cell table:formula="of:=SUM([.S3:.S47])" office:value-type="float" office:value="-32964.92" calcext:value-type="float">
            <text:p>-32964,92</text:p>
          </table:table-cell>
          <table:table-cell table:formula="of:=SUM([.T2:.T47])" office:value-type="float" office:value="-5754.1" calcext:value-type="float">
            <text:p>-5754,1</text:p>
          </table:table-cell>
          <table:table-cell table:formula="of:=SUM([.U2:.U47])" office:value-type="float" office:value="-12452.6" calcext:value-type="float">
            <text:p>-12452,6</text:p>
          </table:table-cell>
          <table:table-cell table:formula="of:=SUM([.V2:.V47])" office:value-type="float" office:value="-6536.16" calcext:value-type="float">
            <text:p>-6536,16</text:p>
          </table:table-cell>
          <table:table-cell table:formula="of:=SUM([.W2:.W47])" office:value-type="float" office:value="157913.16" calcext:value-type="float">
            <text:p>157913,16</text:p>
          </table:table-cell>
          <table:table-cell table:formula="of:=SUM([.X2:.X47])" office:value-type="float" office:value="-2764.03" calcext:value-type="float">
            <text:p>-2764,03</text:p>
          </table:table-cell>
          <table:table-cell/>
          <table:table-cell table:formula="of:=SUM([.Z2:.Z47])" office:value-type="float" office:value="-2733.94" calcext:value-type="float">
            <text:p>-2733,94</text:p>
          </table:table-cell>
          <table:table-cell table:formula="of:=SUM([.AA2:.AA47])" office:value-type="float" office:value="-1046.54" calcext:value-type="float">
            <text:p>-1046,54</text:p>
          </table:table-cell>
          <table:table-cell table:formula="of:=SUM([.AB2:.AB47])" office:value-type="float" office:value="-11897.74" calcext:value-type="float">
            <text:p>-11897,74</text:p>
          </table:table-cell>
          <table:table-cell table:formula="of:=SUM([.AC2:.AC47])" office:value-type="float" office:value="-5593.73" calcext:value-type="float">
            <text:p>-5593,73</text:p>
          </table:table-cell>
          <table:table-cell table:formula="of:=SUM([.AD2:.AD47])" office:value-type="float" office:value="-3132.33" calcext:value-type="float">
            <text:p>-3132,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47])" office:value-type="float" office:value="222.405" calcext:value-type="float">
            <text:p>222,405</text:p>
          </table:table-cell>
          <table:table-cell table:style-name="ce4" table:formula="of:=AVERAGE([.C2:.C47])" office:value-type="float" office:value="-234.563488372093" calcext:value-type="float">
            <text:p>-234,563488372093</text:p>
          </table:table-cell>
          <table:table-cell table:formula="of:=AVERAGE([.D2:.D47])" office:value-type="float" office:value="217.52" calcext:value-type="float">
            <text:p>217,52</text:p>
          </table:table-cell>
          <table:table-cell table:formula="of:=AVERAGE([.E2:.E47])" office:value-type="float" office:value="-235.653488372093" calcext:value-type="float">
            <text:p>-235,653488372093</text:p>
          </table:table-cell>
          <table:table-cell table:style-name="ce4" table:formula="of:=AVERAGE([.F2:.F47])" office:value-type="float" office:value="-87.1788372093023" calcext:value-type="float">
            <text:p>-87,1788372093023</text:p>
          </table:table-cell>
          <table:table-cell table:style-name="ce4" table:formula="of:=AVERAGE([.G2:.G47])" office:value-type="float" office:value="-831.299069767442" calcext:value-type="float">
            <text:p>-831,299069767442</text:p>
          </table:table-cell>
          <table:table-cell table:formula="of:=AVERAGE([.H2:.H47])" office:value-type="float" office:value="101.869302325581" calcext:value-type="float">
            <text:p>101,869302325581</text:p>
          </table:table-cell>
          <table:table-cell table:formula="of:=AVERAGE([.I2:.I47])" office:value-type="float" office:value="-98.9002325581395" calcext:value-type="float">
            <text:p>-98,9002325581395</text:p>
          </table:table-cell>
          <table:table-cell table:formula="of:=AVERAGE([.J2:.J47])" office:value-type="float" office:value="-13.3290697674419" calcext:value-type="float">
            <text:p>-13,3290697674419</text:p>
          </table:table-cell>
          <table:table-cell table:style-name="ce4" table:formula="of:=AVERAGE([.K2:.K47])" office:value-type="float" office:value="-193.260930232558" calcext:value-type="float">
            <text:p>-193,260930232558</text:p>
          </table:table-cell>
          <table:table-cell table:style-name="ce4" table:formula="of:=AVERAGE([.L2:.L47])" office:value-type="float" office:value="-17.906976744186" calcext:value-type="float">
            <text:p>-17,906976744186</text:p>
          </table:table-cell>
          <table:table-cell table:formula="of:=AVERAGE([.M2:.M47])" office:value-type="float" office:value="-6.77" calcext:value-type="float">
            <text:p>-6,77</text:p>
          </table:table-cell>
          <table:table-cell table:formula="of:=AVERAGE([.N2:.N47])" office:value-type="float" office:value="-78.7209302325581" calcext:value-type="float">
            <text:p>-78,7209302325581</text:p>
          </table:table-cell>
          <table:table-cell table:formula="of:=AVERAGE([.O2:.O47])" office:value-type="float" office:value="-2.77186046511628" calcext:value-type="float">
            <text:p>-2,77186046511628</text:p>
          </table:table-cell>
          <table:table-cell table:formula="of:=AVERAGE([.P2:.P47])" office:value-type="float" office:value="-71.6702325581395" calcext:value-type="float">
            <text:p>-71,6702325581395</text:p>
          </table:table-cell>
          <table:table-cell table:formula="of:=AVERAGE([.Q2:.Q47])" office:value-type="float" office:value="-56.5369047619048" calcext:value-type="float">
            <text:p>-56,5369047619048</text:p>
          </table:table-cell>
          <table:table-cell table:formula="of:=AVERAGE([.R2:.R47])" office:value-type="float" office:value="22.8837209302326" calcext:value-type="float">
            <text:p>22,8837209302326</text:p>
          </table:table-cell>
          <table:table-cell table:formula="of:=AVERAGE([.S3:.S47])" office:value-type="float" office:value="-784.879047619048" calcext:value-type="float">
            <text:p>-784,879047619048</text:p>
          </table:table-cell>
          <table:table-cell table:style-name="ce4" table:formula="of:=AVERAGE([.T2:.T47])" office:value-type="float" office:value="-133.816279069767" calcext:value-type="float">
            <text:p>-133,816279069767</text:p>
          </table:table-cell>
          <table:table-cell table:style-name="ce4" table:formula="of:=AVERAGE([.U2:.U47])" office:value-type="float" office:value="-289.595348837209" calcext:value-type="float">
            <text:p>-289,595348837209</text:p>
          </table:table-cell>
          <table:table-cell table:style-name="ce4" table:formula="of:=AVERAGE([.V2:.V47])" office:value-type="float" office:value="-152.003720930233" calcext:value-type="float">
            <text:p>-152,003720930233</text:p>
          </table:table-cell>
          <table:table-cell table:style-name="ce3" table:formula="of:=AVERAGE([.W2:.W47])" office:value-type="float" office:value="3759.83714285714" calcext:value-type="float">
            <text:p>3759,83714285714</text:p>
          </table:table-cell>
          <table:table-cell table:style-name="ce4" table:formula="of:=AVERAGE([.X2:.X47])" office:value-type="float" office:value="-64.2797674418605" calcext:value-type="float">
            <text:p>-64,2797674418605</text:p>
          </table:table-cell>
          <table:table-cell table:style-name="ce4"/>
          <table:table-cell table:style-name="ce4" table:formula="of:=AVERAGE([.Z2:.Z47])" office:value-type="float" office:value="-63.58" calcext:value-type="float">
            <text:p>-63,58</text:p>
          </table:table-cell>
          <table:table-cell table:style-name="ce4" table:formula="of:=AVERAGE([.AA2:.AA47])" office:value-type="float" office:value="-24.3381395348837" calcext:value-type="float">
            <text:p>-24,3381395348837</text:p>
          </table:table-cell>
          <table:table-cell table:style-name="ce4" table:formula="of:=AVERAGE([.AB2:.AB47])" office:value-type="float" office:value="-276.691627906977" calcext:value-type="float">
            <text:p>-276,691627906977</text:p>
          </table:table-cell>
          <table:table-cell table:style-name="ce4" table:formula="of:=AVERAGE([.AC2:.AC47])" office:value-type="float" office:value="-130.086744186047" calcext:value-type="float">
            <text:p>-130,086744186047</text:p>
          </table:table-cell>
          <table:table-cell table:style-name="ce4" table:formula="of:=AVERAGE([.AD2:.AD47])" office:value-type="float" office:value="-72.8448837209302" calcext:value-type="float">
            <text:p>-72,8448837209302</text:p>
          </table:table-cell>
          <table:table-cell table:formula="of:=SUM([.C49:.AD49])-[.W49]" office:value-type="float" office:value="-3578.40455703212" calcext:value-type="float">
            <text:p>-3578,40455703212</text:p>
          </table:table-cell>
          <table:table-cell table:number-columns-repeated="993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Total M-3</text:p>
          </table:table-cell>
          <table:table-cell table:formula="of:=SUM([.B5:.B7])" office:value-type="float" office:value="1188.71" calcext:value-type="float">
            <text:p>1188,71</text:p>
          </table:table-cell>
          <table:table-cell table:formula="of:=SUM([.C5:.C7])" office:value-type="float" office:value="-254.38" calcext:value-type="float">
            <text:p>-254,38</text:p>
          </table:table-cell>
          <table:table-cell table:formula="of:=SUM([.D5:.D7])" office:value-type="float" office:value="-151" calcext:value-type="float">
            <text:p>-151</text:p>
          </table:table-cell>
          <table:table-cell table:formula="of:=SUM([.E5:.E7])" office:value-type="float" office:value="-224.61" calcext:value-type="float">
            <text:p>-224,61</text:p>
          </table:table-cell>
          <table:table-cell table:formula="of:=SUM([.F5:.F7])" office:value-type="float" office:value="-838.95" calcext:value-type="float">
            <text:p>-838,95</text:p>
          </table:table-cell>
          <table:table-cell table:formula="of:=SUM([.G5:.G7])" office:value-type="float" office:value="-1551.08" calcext:value-type="float">
            <text:p>-1551,08</text:p>
          </table:table-cell>
          <table:table-cell table:formula="of:=SUM([.H5:.H7])" office:value-type="float" office:value="-121.84" calcext:value-type="float">
            <text:p>-121,84</text:p>
          </table:table-cell>
          <table:table-cell/>
          <table:table-cell table:formula="of:=SUM([.J5:.J7])" office:value-type="float" office:value="-36" calcext:value-type="float">
            <text:p>-36</text:p>
          </table:table-cell>
          <table:table-cell table:formula="of:=SUM([.K5:.K11])" office:value-type="float" office:value="-861.81" calcext:value-type="float">
            <text:p>-861,81</text:p>
          </table:table-cell>
          <table:table-cell table:formula="of:=SUM([.L5:.L7])" office:value-type="float" office:value="-60" calcext:value-type="float">
            <text:p>-60</text:p>
          </table:table-cell>
          <table:table-cell table:formula="of:=SUM([.M5:.M7])" office:value-type="float" office:value="-21.99" calcext:value-type="float">
            <text:p>-21,99</text:p>
          </table:table-cell>
          <table:table-cell table:formula="of:=SUM([.N5:.N7])" office:value-type="float" office:value="0" calcext:value-type="float">
            <text:p>0</text:p>
          </table:table-cell>
          <table:table-cell/>
          <table:table-cell table:formula="of:=SUM([.P5:.P7])" office:value-type="float" office:value="0" calcext:value-type="float">
            <text:p>0</text:p>
          </table:table-cell>
          <table:table-cell table:formula="of:=SUM([.Q5:.Q7])" office:value-type="float" office:value="0" calcext:value-type="float">
            <text:p>0</text:p>
          </table:table-cell>
          <table:table-cell table:formula="of:=SUM([.R5:.R7])" office:value-type="float" office:value="-577" calcext:value-type="float">
            <text:p>-577</text:p>
          </table:table-cell>
          <table:table-cell table:formula="of:=SUM([.S5:.S7])" office:value-type="float" office:value="-2036" calcext:value-type="float">
            <text:p>-2036</text:p>
          </table:table-cell>
          <table:table-cell table:formula="of:=SUM([.T5:.T7])" office:value-type="float" office:value="-157.88" calcext:value-type="float">
            <text:p>-157,88</text:p>
          </table:table-cell>
          <table:table-cell table:formula="of:=SUM([.U5:.U7])" office:value-type="float" office:value="-910.4" calcext:value-type="float">
            <text:p>-910,4</text:p>
          </table:table-cell>
          <table:table-cell table:formula="of:=SUM([.V5:.V7])" office:value-type="float" office:value="-576.3" calcext:value-type="float">
            <text:p>-576,3</text:p>
          </table:table-cell>
          <table:table-cell table:formula="of:=SUM([.W5:.W7])" office:value-type="float" office:value="11007.59" calcext:value-type="float">
            <text:p>11007,59</text:p>
          </table:table-cell>
          <table:table-cell table:formula="of:=SUM([.X5:.X7])" office:value-type="float" office:value="-112.84" calcext:value-type="float">
            <text:p>-112,84</text:p>
          </table:table-cell>
          <table:table-cell/>
          <table:table-cell table:formula="of:=SUM([.Z5:.Z7])" office:value-type="float" office:value="-171.2" calcext:value-type="float">
            <text:p>-171,2</text:p>
          </table:table-cell>
          <table:table-cell table:formula="of:=SUM([.AA5:.AA7])" office:value-type="float" office:value="-29.15" calcext:value-type="float">
            <text:p>-29,15</text:p>
          </table:table-cell>
          <table:table-cell table:formula="of:=SUM([.AB9:.AB11])" office:value-type="float" office:value="-140.79" calcext:value-type="float">
            <text:p>-140,79</text:p>
          </table:table-cell>
          <table:table-cell table:formula="of:=SUM([.AC5:.AC7])" office:value-type="float" office:value="0" calcext:value-type="float">
            <text:p>0</text:p>
          </table:table-cell>
          <table:table-cell table:formula="of:=SUM([.AD5:.AD7])" office:value-type="float" office:value="-254.06" calcext:value-type="float">
            <text:p>-254,0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y. M-3</text:p>
          </table:table-cell>
          <table:table-cell table:style-name="ce9" table:formula="of:=AVERAGE([.B5:.B7])" office:value-type="float" office:value="396.236666666667" calcext:value-type="float">
            <text:p>396,236666666667</text:p>
          </table:table-cell>
          <table:table-cell table:style-name="ce9" table:formula="of:=AVERAGE([.C5:.C7])" office:value-type="float" office:value="-84.7933333333333" calcext:value-type="float">
            <text:p>-84,7933333333333</text:p>
          </table:table-cell>
          <table:table-cell table:style-name="ce9" table:formula="of:=AVERAGE([.D5:.D7])" office:value-type="float" office:value="-50.3333333333333" calcext:value-type="float">
            <text:p>-50,3333333333333</text:p>
          </table:table-cell>
          <table:table-cell table:style-name="ce9" table:formula="of:=AVERAGE([.E5:.E7])" office:value-type="float" office:value="-74.87" calcext:value-type="float">
            <text:p>-74,87</text:p>
          </table:table-cell>
          <table:table-cell table:style-name="ce9" table:formula="of:=AVERAGE([.F5:.F7])" office:value-type="float" office:value="-279.65" calcext:value-type="float">
            <text:p>-279,65</text:p>
          </table:table-cell>
          <table:table-cell table:style-name="ce9" table:formula="of:=AVERAGE([.G5:.G7])" office:value-type="float" office:value="-517.026666666667" calcext:value-type="float">
            <text:p>-517,026666666667</text:p>
          </table:table-cell>
          <table:table-cell table:style-name="ce9" table:formula="of:=AVERAGE([.H5:.H7])" office:value-type="float" office:value="-40.6133333333333" calcext:value-type="float">
            <text:p>-40,6133333333333</text:p>
          </table:table-cell>
          <table:table-cell table:style-name="ce9"/>
          <table:table-cell table:style-name="ce9" table:formula="of:=AVERAGE([.J5:.J7])" office:value-type="float" office:value="-12" calcext:value-type="float">
            <text:p>-12</text:p>
          </table:table-cell>
          <table:table-cell table:style-name="ce9" table:formula="of:=AVERAGE([.K5:.K11])" office:value-type="float" office:value="-123.115714285714" calcext:value-type="float">
            <text:p>-123,115714285714</text:p>
          </table:table-cell>
          <table:table-cell table:style-name="ce9" table:formula="of:=AVERAGE([.L5:.L7])" office:value-type="float" office:value="-20" calcext:value-type="float">
            <text:p>-20</text:p>
          </table:table-cell>
          <table:table-cell table:style-name="ce9" table:formula="of:=AVERAGE([.M5:.M7])" office:value-type="float" office:value="-7.33" calcext:value-type="float">
            <text:p>-7,33</text:p>
          </table:table-cell>
          <table:table-cell table:style-name="ce9" table:formula="of:=AVERAGE([.N5:.N7])" office:value-type="float" office:value="0" calcext:value-type="float">
            <text:p>0</text:p>
          </table:table-cell>
          <table:table-cell table:style-name="ce9"/>
          <table:table-cell table:style-name="ce9" table:formula="of:=AVERAGE([.P5:.P7])" office:value-type="float" office:value="0" calcext:value-type="float">
            <text:p>0</text:p>
          </table:table-cell>
          <table:table-cell table:style-name="ce9" table:formula="of:=AVERAGE([.Q5:.Q7])" office:value-type="float" office:value="0" calcext:value-type="float">
            <text:p>0</text:p>
          </table:table-cell>
          <table:table-cell table:style-name="ce9" table:formula="of:=AVERAGE([.R5:.R7])" office:value-type="float" office:value="-192.333333333333" calcext:value-type="float">
            <text:p>-192,333333333333</text:p>
          </table:table-cell>
          <table:table-cell table:style-name="ce9" table:formula="of:=AVERAGE([.S5:.S7])" office:value-type="float" office:value="-678.666666666667" calcext:value-type="float">
            <text:p>-678,666666666667</text:p>
          </table:table-cell>
          <table:table-cell table:style-name="ce9" table:formula="of:=AVERAGE([.T14:.T16])" office:value-type="float" office:value="-115.743333333333" calcext:value-type="float">
            <text:p>-115,743333333333</text:p>
          </table:table-cell>
          <table:table-cell table:style-name="ce9" table:formula="of:=AVERAGE([.U5:.U7])" office:value-type="float" office:value="-303.466666666667" calcext:value-type="float">
            <text:p>-303,466666666667</text:p>
          </table:table-cell>
          <table:table-cell table:style-name="ce9" table:formula="of:=AVERAGE([.V5:.V7])" office:value-type="float" office:value="-192.1" calcext:value-type="float">
            <text:p>-192,1</text:p>
          </table:table-cell>
          <table:table-cell table:style-name="ce9" table:formula="of:=AVERAGE([.W5:.W7])" office:value-type="float" office:value="3669.19666666667" calcext:value-type="float">
            <text:p>3669,19666666667</text:p>
          </table:table-cell>
          <table:table-cell table:style-name="ce9" table:formula="of:=AVERAGE([.X5:.X7])" office:value-type="float" office:value="-37.6133333333333" calcext:value-type="float">
            <text:p>-37,6133333333333</text:p>
          </table:table-cell>
          <table:table-cell table:style-name="ce9"/>
          <table:table-cell table:style-name="ce9" table:formula="of:=AVERAGE([.Z5:.Z7])" office:value-type="float" office:value="-57.0666666666667" calcext:value-type="float">
            <text:p>-57,0666666666667</text:p>
          </table:table-cell>
          <table:table-cell table:style-name="ce9" table:formula="of:=AVERAGE([.AA5:.AA7])" office:value-type="float" office:value="-9.71666666666667" calcext:value-type="float">
            <text:p>-9,71666666666667</text:p>
          </table:table-cell>
          <table:table-cell table:style-name="ce9" table:formula="of:=AVERAGE([.AB9:.AB11])" office:value-type="float" office:value="-46.93" calcext:value-type="float">
            <text:p>-46,93</text:p>
          </table:table-cell>
          <table:table-cell table:style-name="ce9" table:formula="of:=AVERAGE([.AC5:.AC7])" office:value-type="float" office:value="0" calcext:value-type="float">
            <text:p>0</text:p>
          </table:table-cell>
          <table:table-cell table:style-name="ce9" table:formula="of:=AVERAGE([.AD5:.AD7])" office:value-type="float" office:value="-84.6866666666667" calcext:value-type="float">
            <text:p>-84,6866666666667</text:p>
          </table:table-cell>
          <table:table-cell table:number-columns-repeated="99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20:05:02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2T18:03:28.633000000</meta:creation-date>
    <dc:date>2025-07-05T21:50:48.013000000</dc:date>
    <meta:editing-duration>P2DT1H28M40S</meta:editing-duration>
    <meta:editing-cycles>41</meta:editing-cycles>
    <meta:generator>LibreOffice/7.1.1.2$Windows_X86_64 LibreOffice_project/fe0b08f4af1bacafe4c7ecc87ce55bb426164676</meta:generator>
    <meta:document-statistic meta:table-count="1" meta:cell-count="1432" meta:object-count="0"/>
  </office:meta>
</office:document-meta>
</file>