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e68f" officeooo:paragraph-rsid="000de68f"/>
    </style:style>
    <style:style style:name="P2" style:family="paragraph" style:parent-style-name="Standard">
      <style:text-properties officeooo:rsid="000de68f" officeooo:paragraph-rsid="000de68f"/>
    </style:style>
    <style:style style:name="P3" style:family="paragraph" style:parent-style-name="Standard">
      <style:text-properties officeooo:rsid="000f2848" officeooo:paragraph-rsid="000f2848"/>
    </style:style>
    <style:style style:name="T1" style:family="text">
      <style:text-properties officeooo:rsid="000efebc"/>
    </style:style>
    <style:style style:name="T2" style:family="text">
      <style:text-properties officeooo:rsid="001027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èces Mika :</text:p>
      <text:p text:style-name="P1"><text:span text:style-name="T1">16/09 - </text:span>11,5 : magic</text:p>
      <text:p text:style-name="P1"><text:span text:style-name="T1">16/09 - </text:span>2,11 : doliprane</text:p>
      <text:p text:style-name="P1"/>
      <text:p text:style-name="P3">18/09 -<text:span text:style-name="T2">60 (ish)</text:span> : bouffe</text:p>
      <text:p text:style-name="P3"><text:s text:c="10"/>-<text:span text:style-name="T2">1</text:span>2 : liv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7T10:17:19.490000000</meta:creation-date>
    <dc:date>2020-09-18T18:20:50.019000000</dc:date>
    <meta:editing-duration>PT4M39S</meta:editing-duration>
    <meta:editing-cycles>4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5" meta:word-count="21" meta:character-count="103" meta:non-whitespace-character-count="77"/>
  </office:meta>
</office:document-meta>
</file>