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VBAProject/FormulaModule.xml" manifest:media-type="text/xml"/>
  <manifest:file-entry manifest:full-path="Basic/VBAProject/Sheet2.xml" manifest:media-type="text/xml"/>
  <manifest:file-entry manifest:full-path="Basic/VBAProject/LastClickModule.xml" manifest:media-type="text/xml"/>
  <manifest:file-entry manifest:full-path="Basic/VBAProject/OrderingModule.xml" manifest:media-type="text/xml"/>
  <manifest:file-entry manifest:full-path="Basic/VBAProject/ThisWorkbook.xml" manifest:media-type="text/xml"/>
  <manifest:file-entry manifest:full-path="Basic/VBAProject/Sheet1.xml" manifest:media-type="text/xml"/>
  <manifest:file-entry manifest:full-path="Basic/VBAProject/Sheet3.xml" manifest:media-type="text/xml"/>
  <manifest:file-entry manifest:full-path="Basic/VBAProject/Sheet4.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073cm"/>
    </style:style>
    <style:style style:name="co2" style:family="table-column">
      <style:table-column-properties fo:break-before="auto" style:column-width="5.881cm"/>
    </style:style>
    <style:style style:name="co3" style:family="table-column">
      <style:table-column-properties fo:break-before="auto" style:column-width="3.528cm"/>
    </style:style>
    <style:style style:name="co4" style:family="table-column">
      <style:table-column-properties fo:break-before="auto" style:column-width="1.177cm"/>
    </style:style>
    <style:style style:name="co5" style:family="table-column">
      <style:table-column-properties fo:break-before="auto" style:column-width="1.674cm"/>
    </style:style>
    <style:style style:name="co6" style:family="table-column">
      <style:table-column-properties fo:break-before="auto" style:column-width="2.351cm"/>
    </style:style>
    <style:style style:name="co7" style:family="table-column">
      <style:table-column-properties fo:break-before="auto" style:column-width="12.151cm"/>
    </style:style>
    <style:style style:name="co8" style:family="table-column">
      <style:table-column-properties fo:break-before="auto" style:column-width="3.136cm"/>
    </style:style>
    <style:style style:name="co9" style:family="table-column">
      <style:table-column-properties fo:break-before="auto" style:column-width="5.405cm"/>
    </style:style>
    <style:style style:name="co10" style:family="table-column">
      <style:table-column-properties fo:break-before="auto" style:column-width="4.509cm"/>
    </style:style>
    <style:style style:name="co11" style:family="table-column">
      <style:table-column-properties fo:break-before="auto" style:column-width="1.54cm"/>
    </style:style>
    <style:style style:name="ro1" style:family="table-row">
      <style:table-row-properties style:row-height="0.529cm" fo:break-before="auto" style:use-optimal-row-height="true"/>
    </style:style>
    <style:style style:name="ro2" style:family="table-row">
      <style:table-row-properties style:row-height="0.931cm" fo:break-before="auto" style:use-optimal-row-height="true"/>
    </style:style>
    <style:style style:name="ro3" style:family="table-row">
      <style:table-row-properties style:row-height="0.995cm" fo:break-before="auto" style:use-optimal-row-height="false"/>
    </style:style>
    <style:style style:name="ro4" style:family="table-row">
      <style:table-row-properties style:row-height="0.487cm" fo:break-before="auto" style:use-optimal-row-height="true"/>
    </style:style>
    <style:style style:name="ta1" style:family="table" style:master-page-name="PageStyle_5f_Vos_20_comptes">
      <style:table-properties table:display="true" style:writing-mode="lr-tb"/>
    </style:style>
    <style:style style:name="ta2" style:family="table" style:master-page-name="PageStyle_5f_Cpt_20_14252_20_00020144101">
      <style:table-properties table:display="true" style:writing-mode="lr-tb"/>
    </style:style>
    <style:style style:name="ta3" style:family="table" style:master-page-name="PageStyle_5f_hidden">
      <style:table-properties table:display="fals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style:style style:name="ce1" style:family="table-cell" style:parent-style-name="Header">
      <style:table-cell-properties fo:border="none" style:rotation-align="none"/>
    </style:style>
    <style:style style:name="ce2" style:family="table-cell" style:parent-style-name="Default">
      <style:table-cell-properties style:rotation-align="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TableHeader">
      <style:table-cell-properties style:rotation-align="none"/>
    </style:style>
    <style:style style:name="ce4" style:family="table-cell" style:parent-style-name="HyperLink_20_1">
      <style:table-cell-properties fo:border-bottom="none" style:diagonal-bl-tr="none" style:diagonal-tl-br="none" fo:border-left="none" fo:border-right="0.74pt solid #666666" style:rotation-align="none" fo:border-top="none"/>
    </style:style>
    <style:style style:name="ce5" style:family="table-cell" style:parent-style-name="Default">
      <style:table-cell-properties fo:border-bottom="0.74pt solid #666666" style:diagonal-bl-tr="none" style:diagonal-tl-br="none" fo:border-left="none" fo:border-right="0.74pt solid #666666" style:rotation-align="none" fo:border-top="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Header">
      <style:table-cell-properties style:rotation-align="none"/>
    </style:style>
    <style:style style:name="ce7" style:family="table-cell" style:parent-style-name="Default">
      <style:table-cell-properties fo:border-bottom="none" style:diagonal-bl-tr="none" style:diagonal-tl-br="none" fo:border-left="none" fo:border-right="0.74pt solid #666666" style:rotation-align="none" fo:border-top="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4">
      <style:table-cell-properties fo:border-bottom="none" style:diagonal-bl-tr="none" style:diagonal-tl-br="none" fo:border-left="none" fo:border-right="0.74pt solid #666666" style:rotation-align="none" fo:border-top="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4">
      <style:table-cell-properties fo:border-bottom="0.74pt solid #666666" style:diagonal-bl-tr="none" style:diagonal-tl-br="none" fo:border-left="none" fo:border-right="0.74pt solid #666666" style:rotation-align="none" fo:border-top="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Header">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0.74pt solid #666666" fo:background-color="#d5e1ef" style:diagonal-bl-tr="none" style:diagonal-tl-br="none" style:text-align-source="value-type" style:repeat-content="false" fo:wrap-option="no-wrap" fo:border-left="none" style:direction="ltr" fo:border-right="none"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TableHeader">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5" style:family="table-cell" style:parent-style-name="Default" style:data-style-name="N30">
      <style:table-cell-properties fo:border-bottom="none"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30">
      <style:table-cell-properties fo:border-bottom="none"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HyperLink_20_1">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4170a9"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 style:family="table-cell" style:parent-style-name="Header">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0" style:family="table-cell" style:parent-style-name="HyperLink_20_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4170a9"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none" fo:background-color="#d5e1ef" style:diagonal-bl-tr="none" style:diagonal-tl-br="none" style:text-align-source="value-type" style:repeat-content="false" fo:wrap-option="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74pt solid #666666" fo:background-color="#d5e1ef" style:diagonal-bl-tr="none" style:diagonal-tl-br="none" style:text-align-source="fix" style:repeat-content="false" fo:wrap-option="no-wrap" fo:border-left="none" style:direction="ltr" fo:border-right="none" style:rotation-angle="0" style:rotation-align="none" style:shrink-to-fit="false" fo:border-top="0.74pt solid #666666" style:vertical-align="middle" loext:vertical-justify="auto"/>
      <style:paragraph-properties fo:text-align="end" css3t:text-justify="auto" fo:margin-left="0cm" style:writing-mode="page"/>
      <style:text-properties fo:color="#262626"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 style:family="table-cell" style:parent-style-name="Default" style:data-style-name="N129">
      <style:table-cell-properties fo:border-bottom="none"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29">
      <style:table-cell-properties fo:border-bottom="none"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29">
      <style:table-cell-properties fo:border-bottom="0.74pt solid #666666"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TableHeader">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os comptes" table:style-name="ta1" table:print-ranges="'Vos comptes'.A1:'Vos comptes'.D5">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60" table:default-cell-style-name="Default"/>
        <table:table-row table:style-name="ro1">
          <table:table-cell table:style-name="ce1" office:value-type="string" calcext:value-type="string" table:number-columns-spanned="4" table:number-rows-spanned="1">
            <text:p>Votre situation financière au 12/09/2020</text:p>
          </table:table-cell>
          <table:covered-table-cell table:number-columns-repeated="3" table:style-name="ce6" office:value-type="string" calcext:value-type="string">
            <text:p>Votre situation financière au 12/09/2020</text:p>
          </table:covered-table-cell>
          <table:table-cell table:number-columns-repeated="60"/>
        </table:table-row>
        <table:table-row table:style-name="ro1">
          <table:table-cell table:number-columns-repeated="64"/>
        </table:table-row>
        <table:table-row table:style-name="ro1">
          <table:table-cell table:style-name="ce3" office:value-type="string" calcext:value-type="string">
            <text:p>Compte</text:p>
          </table:table-cell>
          <table:table-cell table:style-name="ce3" office:value-type="string" calcext:value-type="string">
            <text:p>R.I.B.</text:p>
          </table:table-cell>
          <table:table-cell table:style-name="ce3" office:value-type="string" calcext:value-type="string">
            <text:p>Solde</text:p>
          </table:table-cell>
          <table:table-cell table:style-name="ce3" office:value-type="string" calcext:value-type="string">
            <text:p>Dev</text:p>
          </table:table-cell>
          <table:table-cell table:number-columns-repeated="60"/>
        </table:table-row>
        <table:table-row table:style-name="ro1">
          <table:table-cell table:style-name="ce4" office:value-type="string" calcext:value-type="string">
            <text:p><text:a xlink:href="#'Cpt 14252 00020144101'.A1" xlink:type="simple">START Jeunes Actifs M DEMIRDELEN MIKAIL</text:a></text:p>
          </table:table-cell>
          <table:table-cell table:style-name="ce7" office:value-type="string" calcext:value-type="string">
            <text:p>30047 14252 00020144101</text:p>
          </table:table-cell>
          <table:table-cell table:style-name="ce8" office:value-type="float" office:value="-8.76" calcext:value-type="float">
            <text:p>-8,76</text:p>
          </table:table-cell>
          <table:table-cell table:style-name="ce7" office:value-type="string" calcext:value-type="string">
            <text:p>EUR</text:p>
          </table:table-cell>
          <table:table-cell table:number-columns-repeated="60"/>
        </table:table-row>
        <table:table-row table:style-name="ro1">
          <table:table-cell table:style-name="ce5" office:value-type="string" calcext:value-type="string">
            <text:p>PRET ETUDE Bpifrance</text:p>
          </table:table-cell>
          <table:table-cell table:style-name="ce5" office:value-type="string" calcext:value-type="string">
            <text:p>30047 14252 00020144103</text:p>
          </table:table-cell>
          <table:table-cell table:style-name="ce9" office:value-type="float" office:value="-5746.4" calcext:value-type="float">
            <text:p>-5 746,40</text:p>
          </table:table-cell>
          <table:table-cell table:style-name="ce5" office:value-type="string" calcext:value-type="string">
            <text:p>EUR</text:p>
          </table:table-cell>
          <table:table-cell table:number-columns-repeated="60"/>
        </table:table-row>
        <table:table-row table:style-name="ro1" table:number-rows-repeated="1048570">
          <table:table-cell table:number-columns-repeated="64"/>
        </table:table-row>
        <table:table-row table:style-name="ro1">
          <table:table-cell table:number-columns-repeated="64"/>
        </table:table-row>
        <table:named-expressions>
          <table:named-range table:name="_xlnm.Print_Area" table:base-cell-address="$'Vos comptes'.$A$1" table:cell-range-address="$'Vos comptes'.$A$1:.$D$5" table:range-usable-as="print-range"/>
        </table:named-expressions>
      </table:table>
      <table:table table:name="Cpt 14252 00020144101" table:style-name="ta2" table:print-ranges="'Cpt 14252 00020144101'.A1:'Cpt 14252 00020144101'.F28">
        <office:forms form:automatic-focus="false" form:apply-design-mode="false"/>
        <table:table-column table:style-name="co6" table:number-columns-repeated="2" table:default-cell-style-name="ce2"/>
        <table:table-column table:style-name="co7" table:default-cell-style-name="ce2"/>
        <table:table-column table:style-name="co8" table:number-columns-repeated="3" table:default-cell-style-name="ce2"/>
        <table:table-column table:style-name="co5" table:number-columns-repeated="58" table:default-cell-style-name="Default"/>
        <table:table-row table:style-name="ro1">
          <table:table-cell table:style-name="ce10" office:value-type="string" calcext:value-type="string" table:number-columns-spanned="6" table:number-rows-spanned="1">
            <text:p>Situation de votre compte START Jeunes Actifs M DEMIRDELEN MIKAIL (EUR) au 12/09/2020</text:p>
          </table:table-cell>
          <table:covered-table-cell table:number-columns-repeated="5" table:style-name="ce19" office:value-type="string" calcext:value-type="string">
            <text:p>Situation de votre compte START Jeunes Actifs M DEMIRDELEN MIKAIL (EUR) au 12/09/2020</text:p>
          </table:covered-table-cell>
          <table:table-cell table:number-columns-repeated="58"/>
        </table:table-row>
        <table:table-row table:style-name="ro1">
          <table:table-cell table:style-name="ce11" office:value-type="string" calcext:value-type="string" table:number-columns-spanned="6" table:number-rows-spanned="1">
            <text:p>R.I.B. : 30047 14252 00020144101</text:p>
          </table:table-cell>
          <table:covered-table-cell table:number-columns-repeated="5" table:style-name="ce13" office:value-type="string" calcext:value-type="string">
            <text:p>R.I.B. : 30047 14252 00020144101</text:p>
          </table:covered-table-cell>
          <table:table-cell table:number-columns-repeated="58"/>
        </table:table-row>
        <table:table-row table:style-name="ro1">
          <table:table-cell table:style-name="ce12" table:number-columns-spanned="3" table:number-rows-spanned="1"/>
          <table:covered-table-cell table:number-columns-repeated="2" table:style-name="ce12"/>
          <table:table-cell table:style-name="ce23" office:value-type="string" calcext:value-type="string" table:number-columns-spanned="2" table:number-rows-spanned="1">
            <text:p>Solde initial : </text:p>
          </table:table-cell>
          <table:covered-table-cell table:style-name="ce23" office:value-type="string" calcext:value-type="string">
            <text:p>Solde initial : </text:p>
          </table:covered-table-cell>
          <table:table-cell table:style-name="ce26" table:formula="of:=[.F27]-SUM([.D6:.D25])-SUM([.E6:.E25])" office:value-type="currency" office:currency="EUR" office:value="-68.5700000000002" calcext:value-type="currency">
            <text:p>-68,57 €</text:p>
          </table:table-cell>
          <table:table-cell table:number-columns-repeated="58"/>
        </table:table-row>
        <table:table-row table:style-name="ro1">
          <table:table-cell table:style-name="ce13" table:number-columns-repeated="3"/>
          <table:table-cell table:style-name="ce18" office:value-type="string" calcext:value-type="string" table:number-columns-spanned="3" table:number-rows-spanned="1">
            <text:p><text:a xlink:href="#'Vos comptes'.A1" xlink:type="simple">Liste de vos comptes</text:a></text:p>
          </table: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table-cell table:number-columns-repeated="58"/>
        </table:table-row>
        <table:table-row table:style-name="ro1">
          <table:table-cell table:style-name="ce14" office:value-type="string" calcext:value-type="string">
            <text:p><text:a xlink:href="#'Cpt 14252 00020144101'.A5" xlink:type="simple">Date</text:a></text:p>
          </table:table-cell>
          <table:table-cell table:style-name="ce14" office:value-type="string" calcext:value-type="string">
            <text:p><text:a xlink:href="#'Cpt 14252 00020144101'.B5" xlink:type="simple">Valeur</text:a></text:p>
          </table:table-cell>
          <table:table-cell table:style-name="ce14" office:value-type="string" calcext:value-type="string">
            <text:p><text:a xlink:href="#'Cpt 14252 00020144101'!C5" xlink:type="simple">Libellé</text:a></text:p>
          </table:table-cell>
          <table:table-cell table:style-name="ce14" office:value-type="string" calcext:value-type="string">
            <text:p><text:a xlink:href="#'Cpt 14252 00020144101'.D5" xlink:type="simple">Débit</text:a></text:p>
          </table:table-cell>
          <table:table-cell table:style-name="ce14" office:value-type="string" calcext:value-type="string">
            <text:p><text:a xlink:href="#'Cpt 14252 00020144101'.E5" xlink:type="simple">Crédit</text:a></text:p>
          </table:table-cell>
          <table:table-cell table:style-name="ce27" office:value-type="string" calcext:value-type="string">
            <text:p>Solde</text:p>
          </table:table-cell>
          <table:table-cell table:number-columns-repeated="58"/>
        </table:table-row>
        <table:table-row table:style-name="ro2">
          <table:table-cell table:number-columns-repeated="2" table:style-name="ce15" office:value-type="date" office:date-value="2020-07-15" calcext:value-type="date">
            <text:p>15/07/2020</text:p>
          </table:table-cell>
          <table:table-cell table:style-name="ce21" office:value-type="string" calcext:value-type="string">
            <text:p>PRLV SEPA LA CROIX ROUGE RCUR-28782721 VOTRE DON CRF - H4715748</text:p>
          </table:table-cell>
          <table:table-cell table:style-name="ce24" office:value-type="currency" office:currency="EUR" office:value="-5" calcext:value-type="currency">
            <text:p>-5,00 €</text:p>
          </table:table-cell>
          <table:table-cell table:style-name="ce21"/>
          <table:table-cell table:style-name="ce24" table:formula="of:=[.F3]+[.D6]+[.E6]" office:value-type="currency" office:currency="EUR" office:value="-73.5700000000002" calcext:value-type="currency">
            <text:p>-73,57 €</text:p>
          </table:table-cell>
          <table:table-cell table:number-columns-repeated="58"/>
        </table:table-row>
        <table:table-row table:style-name="ro3">
          <table:table-cell table:number-columns-repeated="2" table:style-name="ce16" office:value-type="date" office:date-value="2020-07-15" calcext:value-type="date">
            <text:p>15/07/2020</text:p>
          </table:table-cell>
          <table:table-cell table:style-name="ce22" office:value-type="string" calcext:value-type="string">
            <text:p>PAIEMENT CB 1307 CESSON SEVIGN MAC DONALD'S CARTE 01960615</text:p>
          </table:table-cell>
          <table:table-cell table:style-name="ce25" office:value-type="currency" office:currency="EUR" office:value="-21.15" calcext:value-type="currency">
            <text:p>-21,15 €</text:p>
          </table:table-cell>
          <table:table-cell table:style-name="ce22"/>
          <table:table-cell table:style-name="ce25" table:formula="of:=IF([.F6]&lt;&gt;&quot;NA&quot;;[.F6]+[.D7]+[.E7];&quot;NA&quot;)" office:value-type="currency" office:currency="EUR" office:value="-94.7200000000002" calcext:value-type="currency">
            <text:p>-94,72 €</text:p>
          </table:table-cell>
          <table:table-cell table:number-columns-repeated="58"/>
        </table:table-row>
        <table:table-row table:style-name="ro1">
          <table:table-cell table:number-columns-repeated="2" table:style-name="ce15" office:value-type="date" office:date-value="2020-07-17" calcext:value-type="date">
            <text:p>17/07/2020</text:p>
          </table:table-cell>
          <table:table-cell table:style-name="ce21" office:value-type="string" calcext:value-type="string">
            <text:p>VIR INST M. KEVIN BIARDEAU</text:p>
          </table:table-cell>
          <table:table-cell table:style-name="ce21"/>
          <table:table-cell table:style-name="ce24" office:value-type="currency" office:currency="EUR" office:value="50" calcext:value-type="currency">
            <text:p>50,00 €</text:p>
          </table:table-cell>
          <table:table-cell table:style-name="ce24" table:formula="of:=IF([.F7]&lt;&gt;&quot;NA&quot;;[.F7]+[.D8]+[.E8];&quot;NA&quot;)" office:value-type="currency" office:currency="EUR" office:value="-44.7200000000002" calcext:value-type="currency">
            <text:p>-44,72 €</text:p>
          </table:table-cell>
          <table:table-cell table:number-columns-repeated="58"/>
        </table:table-row>
        <table:table-row table:style-name="ro4">
          <table:table-cell table:number-columns-repeated="2" table:style-name="ce16" office:value-type="date" office:date-value="2020-07-27" calcext:value-type="date">
            <text:p>27/07/2020</text:p>
          </table:table-cell>
          <table:table-cell table:style-name="ce22" office:value-type="string" calcext:value-type="string">
            <text:p>PAIEMENT CB 2407 RENNES PADRO CRF CITY CARTE 01960615</text:p>
          </table:table-cell>
          <table:table-cell table:style-name="ce25" office:value-type="currency" office:currency="EUR" office:value="-17.27" calcext:value-type="currency">
            <text:p>-17,27 €</text:p>
          </table:table-cell>
          <table:table-cell table:style-name="ce22"/>
          <table:table-cell table:style-name="ce25" table:formula="of:=IF([.F8]&lt;&gt;&quot;NA&quot;;[.F8]+[.D9]+[.E9];&quot;NA&quot;)" office:value-type="currency" office:currency="EUR" office:value="-61.9900000000002" calcext:value-type="currency">
            <text:p>-61,99 €</text:p>
          </table:table-cell>
          <table:table-cell table:number-columns-repeated="58"/>
        </table:table-row>
        <table:table-row table:style-name="ro2">
          <table:table-cell table:number-columns-repeated="2" table:style-name="ce15" office:value-type="date" office:date-value="2020-07-27" calcext:value-type="date">
            <text:p>27/07/2020</text:p>
          </table:table-cell>
          <table:table-cell table:style-name="ce21" office:value-type="string" calcext:value-type="string">
            <text:p>PAIEMENT CB 2407 CESSON SEVIGN LA POSTE L350510 CARTE 01960615</text:p>
          </table:table-cell>
          <table:table-cell table:style-name="ce24" office:value-type="currency" office:currency="EUR" office:value="-1.42" calcext:value-type="currency">
            <text:p>-1,42 €</text:p>
          </table:table-cell>
          <table:table-cell table:style-name="ce21"/>
          <table:table-cell table:style-name="ce24" table:formula="of:=IF([.F9]&lt;&gt;&quot;NA&quot;;[.F9]+[.D10]+[.E10];&quot;NA&quot;)" office:value-type="currency" office:currency="EUR" office:value="-63.4100000000002" calcext:value-type="currency">
            <text:p>-63,41 €</text:p>
          </table:table-cell>
          <table:table-cell table:number-columns-repeated="58"/>
        </table:table-row>
        <table:table-row table:style-name="ro2">
          <table:table-cell table:number-columns-repeated="2" table:style-name="ce16" office:value-type="date" office:date-value="2020-07-28" calcext:value-type="date">
            <text:p>28/07/2020</text:p>
          </table:table-cell>
          <table:table-cell table:style-name="ce22" office:value-type="string" calcext:value-type="string">
            <text:p>PRLV SEPA PAYPAL EUROPE S.A.R.L 1009764716394 PAYPAL VIREMENT 1009764716394 PAYPAL</text:p>
          </table:table-cell>
          <table:table-cell table:style-name="ce25" office:value-type="currency" office:currency="EUR" office:value="-9.99" calcext:value-type="currency">
            <text:p>-9,99 €</text:p>
          </table:table-cell>
          <table:table-cell table:style-name="ce22"/>
          <table:table-cell table:style-name="ce25" table:formula="of:=IF([.F10]&lt;&gt;&quot;NA&quot;;[.F10]+[.D11]+[.E11];&quot;NA&quot;)" office:value-type="currency" office:currency="EUR" office:value="-73.4000000000002" calcext:value-type="currency">
            <text:p>-73,40 €</text:p>
          </table:table-cell>
          <table:table-cell table:number-columns-repeated="58"/>
        </table:table-row>
        <table:table-row table:style-name="ro2">
          <table:table-cell table:number-columns-repeated="2" table:style-name="ce15" office:value-type="date" office:date-value="2020-08-03" calcext:value-type="date">
            <text:p>03/08/2020</text:p>
          </table:table-cell>
          <table:table-cell table:style-name="ce21" office:value-type="string" calcext:value-type="string">
            <text:p>VIR POLE EMPLOI BRETAGNE 20211009596 27 360 44016683 03082020</text:p>
          </table:table-cell>
          <table:table-cell table:style-name="ce21"/>
          <table:table-cell table:style-name="ce24" office:value-type="currency" office:currency="EUR" office:value="1057.72" calcext:value-type="currency">
            <text:p>1 057,72 €</text:p>
          </table:table-cell>
          <table:table-cell table:style-name="ce24" table:formula="of:=IF([.F11]&lt;&gt;&quot;NA&quot;;[.F11]+[.D12]+[.E12];&quot;NA&quot;)" office:value-type="currency" office:currency="EUR" office:value="984.32" calcext:value-type="currency">
            <text:p>984,32 €</text:p>
          </table:table-cell>
          <table:table-cell table:number-columns-repeated="58"/>
        </table:table-row>
        <table:table-row table:style-name="ro1">
          <table:table-cell table:number-columns-repeated="2" table:style-name="ce16" office:value-type="date" office:date-value="2020-08-05" calcext:value-type="date">
            <text:p>05/08/2020</text:p>
          </table:table-cell>
          <table:table-cell table:style-name="ce22" office:value-type="string" calcext:value-type="string">
            <text:p>ECH PRET CAP+IN 14252 201441 03</text:p>
          </table:table-cell>
          <table:table-cell table:style-name="ce25" office:value-type="currency" office:currency="EUR" office:value="-271.62" calcext:value-type="currency">
            <text:p>-271,62 €</text:p>
          </table:table-cell>
          <table:table-cell table:style-name="ce22"/>
          <table:table-cell table:style-name="ce25" table:formula="of:=IF([.F12]&lt;&gt;&quot;NA&quot;;[.F12]+[.D13]+[.E13];&quot;NA&quot;)" office:value-type="currency" office:currency="EUR" office:value="712.7" calcext:value-type="currency">
            <text:p>712,70 €</text:p>
          </table:table-cell>
          <table:table-cell table:number-columns-repeated="58"/>
        </table:table-row>
        <table:table-row table:style-name="ro2">
          <table:table-cell table:number-columns-repeated="2" table:style-name="ce15" office:value-type="date" office:date-value="2020-08-07" calcext:value-type="date">
            <text:p>07/08/2020</text:p>
          </table:table-cell>
          <table:table-cell table:style-name="ce21" office:value-type="string" calcext:value-type="string">
            <text:p>PRLV SEPA PAYPAL EUROPE S.A.R.L 1009909444880 PAYPAL VIREMENT 1009909444880 PAYPAL</text:p>
          </table:table-cell>
          <table:table-cell table:style-name="ce24" office:value-type="currency" office:currency="EUR" office:value="-3.3" calcext:value-type="currency">
            <text:p>-3,30 €</text:p>
          </table:table-cell>
          <table:table-cell table:style-name="ce21"/>
          <table:table-cell table:style-name="ce24" table:formula="of:=IF([.F13]&lt;&gt;&quot;NA&quot;;[.F13]+[.D14]+[.E14];&quot;NA&quot;)" office:value-type="currency" office:currency="EUR" office:value="709.4" calcext:value-type="currency">
            <text:p>709,40 €</text:p>
          </table:table-cell>
          <table:table-cell table:number-columns-repeated="58"/>
        </table:table-row>
        <table:table-row table:style-name="ro1">
          <table:table-cell table:style-name="ce16" office:value-type="date" office:date-value="2020-08-07" calcext:value-type="date">
            <text:p>07/08/2020</text:p>
          </table:table-cell>
          <table:table-cell table:style-name="ce16" office:value-type="date" office:date-value="2020-08-01" calcext:value-type="date">
            <text:p>01/08/2020</text:p>
          </table:table-cell>
          <table:table-cell table:style-name="ce22" office:value-type="string" calcext:value-type="string">
            <text:p>F COTIS START J. ACTIFS</text:p>
          </table:table-cell>
          <table:table-cell table:style-name="ce25" office:value-type="currency" office:currency="EUR" office:value="-5.5" calcext:value-type="currency">
            <text:p>-5,50 €</text:p>
          </table:table-cell>
          <table:table-cell table:style-name="ce22"/>
          <table:table-cell table:style-name="ce25" table:formula="of:=IF([.F14]&lt;&gt;&quot;NA&quot;;[.F14]+[.D15]+[.E15];&quot;NA&quot;)" office:value-type="currency" office:currency="EUR" office:value="703.9" calcext:value-type="currency">
            <text:p>703,90 €</text:p>
          </table:table-cell>
          <table:table-cell table:number-columns-repeated="58"/>
        </table:table-row>
        <table:table-row table:style-name="ro1">
          <table:table-cell table:number-columns-repeated="2" table:style-name="ce15" office:value-type="date" office:date-value="2020-08-09" calcext:value-type="date">
            <text:p>09/08/2020</text:p>
          </table:table-cell>
          <table:table-cell table:style-name="ce21" office:value-type="string" calcext:value-type="string">
            <text:p>VIR SEPA COMPTE COMMUN - MIKA M</text:p>
          </table:table-cell>
          <table:table-cell table:style-name="ce24" office:value-type="currency" office:currency="EUR" office:value="-700" calcext:value-type="currency">
            <text:p>-700,00 €</text:p>
          </table:table-cell>
          <table:table-cell table:style-name="ce21"/>
          <table:table-cell table:style-name="ce24" table:formula="of:=IF([.F15]&lt;&gt;&quot;NA&quot;;[.F15]+[.D16]+[.E16];&quot;NA&quot;)" office:value-type="currency" office:currency="EUR" office:value="3.89999999999986" calcext:value-type="currency">
            <text:p>3,90 €</text:p>
          </table:table-cell>
          <table:table-cell table:number-columns-repeated="58"/>
        </table:table-row>
        <table:table-row table:style-name="ro2">
          <table:table-cell table:number-columns-repeated="2" table:style-name="ce16" office:value-type="date" office:date-value="2020-08-17" calcext:value-type="date">
            <text:p>17/08/2020</text:p>
          </table:table-cell>
          <table:table-cell table:style-name="ce22" office:value-type="string" calcext:value-type="string">
            <text:p>PRLV SEPA LA CROIX ROUGE RCUR-29717438 VOTRE DON CRF - H4715748</text:p>
          </table:table-cell>
          <table:table-cell table:style-name="ce25" office:value-type="currency" office:currency="EUR" office:value="-5" calcext:value-type="currency">
            <text:p>-5,00 €</text:p>
          </table:table-cell>
          <table:table-cell table:style-name="ce22"/>
          <table:table-cell table:style-name="ce25" table:formula="of:=IF([.F16]&lt;&gt;&quot;NA&quot;;[.F16]+[.D17]+[.E17];&quot;NA&quot;)" office:value-type="currency" office:currency="EUR" office:value="-1.10000000000014" calcext:value-type="currency">
            <text:p>-1,10 €</text:p>
          </table:table-cell>
          <table:table-cell table:number-columns-repeated="58"/>
        </table:table-row>
        <table:table-row table:style-name="ro2">
          <table:table-cell table:number-columns-repeated="2" table:style-name="ce15" office:value-type="date" office:date-value="2020-08-26" calcext:value-type="date">
            <text:p>26/08/2020</text:p>
          </table:table-cell>
          <table:table-cell table:style-name="ce21" office:value-type="string" calcext:value-type="string">
            <text:p>PRLV SEPA PAYPAL EUROPE S.A.R.L 1010115378172 PAYPAL VIREMENT 1010115378172 PAYPAL</text:p>
          </table:table-cell>
          <table:table-cell table:style-name="ce24" office:value-type="currency" office:currency="EUR" office:value="-9.99" calcext:value-type="currency">
            <text:p>-9,99 €</text:p>
          </table:table-cell>
          <table:table-cell table:style-name="ce21"/>
          <table:table-cell table:style-name="ce24" table:formula="of:=IF([.F17]&lt;&gt;&quot;NA&quot;;[.F17]+[.D18]+[.E18];&quot;NA&quot;)" office:value-type="currency" office:currency="EUR" office:value="-11.0900000000001" calcext:value-type="currency">
            <text:p>-11,09 €</text:p>
          </table:table-cell>
          <table:table-cell table:number-columns-repeated="58"/>
        </table:table-row>
        <table:table-row table:style-name="ro2">
          <table:table-cell table:number-columns-repeated="2" table:style-name="ce16" office:value-type="date" office:date-value="2020-09-01" calcext:value-type="date">
            <text:p>01/09/2020</text:p>
          </table:table-cell>
          <table:table-cell table:style-name="ce22" office:value-type="string" calcext:value-type="string">
            <text:p>VIR POLE EMPLOI BRETAGNE 20243004867 27 360 44016683 01092020</text:p>
          </table:table-cell>
          <table:table-cell table:style-name="ce22"/>
          <table:table-cell table:style-name="ce25" office:value-type="currency" office:currency="EUR" office:value="1057.72" calcext:value-type="currency">
            <text:p>1 057,72 €</text:p>
          </table:table-cell>
          <table:table-cell table:style-name="ce25" table:formula="of:=IF([.F18]&lt;&gt;&quot;NA&quot;;[.F18]+[.D19]+[.E19];&quot;NA&quot;)" office:value-type="currency" office:currency="EUR" office:value="1046.63" calcext:value-type="currency">
            <text:p>1 046,63 €</text:p>
          </table:table-cell>
          <table:table-cell table:number-columns-repeated="58"/>
        </table:table-row>
        <table:table-row table:style-name="ro1">
          <table:table-cell table:number-columns-repeated="2" table:style-name="ce15" office:value-type="date" office:date-value="2020-09-01" calcext:value-type="date">
            <text:p>01/09/2020</text:p>
          </table:table-cell>
          <table:table-cell table:style-name="ce21" office:value-type="string" calcext:value-type="string">
            <text:p>VIR SEPA COMPTE COMMUN - MIKA M</text:p>
          </table:table-cell>
          <table:table-cell table:style-name="ce24" office:value-type="currency" office:currency="EUR" office:value="-700" calcext:value-type="currency">
            <text:p>-700,00 €</text:p>
          </table:table-cell>
          <table:table-cell table:style-name="ce21"/>
          <table:table-cell table:style-name="ce24" table:formula="of:=IF([.F19]&lt;&gt;&quot;NA&quot;;[.F19]+[.D20]+[.E20];&quot;NA&quot;)" office:value-type="currency" office:currency="EUR" office:value="346.63" calcext:value-type="currency">
            <text:p>346,63 €</text:p>
          </table:table-cell>
          <table:table-cell table:number-columns-repeated="58"/>
        </table:table-row>
        <table:table-row table:style-name="ro2">
          <table:table-cell table:number-columns-repeated="2" table:style-name="ce16" office:value-type="date" office:date-value="2020-09-04" calcext:value-type="date">
            <text:p>04/09/2020</text:p>
          </table:table-cell>
          <table:table-cell table:style-name="ce22" office:value-type="string" calcext:value-type="string">
            <text:p>PRLV SEPA PAYPAL EUROPE S.A.R.L 1010228162445 PAYPAL VIREMENT 1010228162445 PAYPAL</text:p>
          </table:table-cell>
          <table:table-cell table:style-name="ce25" office:value-type="currency" office:currency="EUR" office:value="-24.99" calcext:value-type="currency">
            <text:p>-24,99 €</text:p>
          </table:table-cell>
          <table:table-cell table:style-name="ce22"/>
          <table:table-cell table:style-name="ce25" table:formula="of:=IF([.F20]&lt;&gt;&quot;NA&quot;;[.F20]+[.D21]+[.E21];&quot;NA&quot;)" office:value-type="currency" office:currency="EUR" office:value="321.64" calcext:value-type="currency">
            <text:p>321,64 €</text:p>
          </table:table-cell>
          <table:table-cell table:number-columns-repeated="58"/>
        </table:table-row>
        <table:table-row table:style-name="ro1">
          <table:table-cell table:style-name="ce15" office:value-type="date" office:date-value="2020-09-04" calcext:value-type="date">
            <text:p>04/09/2020</text:p>
          </table:table-cell>
          <table:table-cell table:style-name="ce15" office:value-type="date" office:date-value="2020-09-05" calcext:value-type="date">
            <text:p>05/09/2020</text:p>
          </table:table-cell>
          <table:table-cell table:style-name="ce21" office:value-type="string" calcext:value-type="string">
            <text:p>ECH PRET CAP+IN 14252 201441 03</text:p>
          </table:table-cell>
          <table:table-cell table:style-name="ce24" office:value-type="currency" office:currency="EUR" office:value="-271.61" calcext:value-type="currency">
            <text:p>-271,61 €</text:p>
          </table:table-cell>
          <table:table-cell table:style-name="ce21"/>
          <table:table-cell table:style-name="ce24" table:formula="of:=IF([.F21]&lt;&gt;&quot;NA&quot;;[.F21]+[.D22]+[.E22];&quot;NA&quot;)" office:value-type="currency" office:currency="EUR" office:value="50.0299999999999" calcext:value-type="currency">
            <text:p>50,03 €</text:p>
          </table:table-cell>
          <table:table-cell table:number-columns-repeated="58"/>
        </table:table-row>
        <table:table-row table:style-name="ro2">
          <table:table-cell table:number-columns-repeated="2" table:style-name="ce16" office:value-type="date" office:date-value="2020-09-07" calcext:value-type="date">
            <text:p>07/09/2020</text:p>
          </table:table-cell>
          <table:table-cell table:style-name="ce22" office:value-type="string" calcext:value-type="string">
            <text:p>PAIEMENT CB 0709 INTERNET XSOLLA _MTG AREN CARTE 01960615</text:p>
          </table:table-cell>
          <table:table-cell table:style-name="ce25" office:value-type="currency" office:currency="EUR" office:value="-49.99" calcext:value-type="currency">
            <text:p>-49,99 €</text:p>
          </table:table-cell>
          <table:table-cell table:style-name="ce22"/>
          <table:table-cell table:style-name="ce25" table:formula="of:=IF([.F22]&lt;&gt;&quot;NA&quot;;[.F22]+[.D23]+[.E23];&quot;NA&quot;)" office:value-type="currency" office:currency="EUR" office:value="0.039999999999857" calcext:value-type="currency">
            <text:p>0,04 €</text:p>
          </table:table-cell>
          <table:table-cell table:number-columns-repeated="58"/>
        </table:table-row>
        <table:table-row table:style-name="ro1">
          <table:table-cell table:style-name="ce15" office:value-type="date" office:date-value="2020-09-07" calcext:value-type="date">
            <text:p>07/09/2020</text:p>
          </table:table-cell>
          <table:table-cell table:style-name="ce15" office:value-type="date" office:date-value="2020-09-01" calcext:value-type="date">
            <text:p>01/09/2020</text:p>
          </table:table-cell>
          <table:table-cell table:style-name="ce21" office:value-type="string" calcext:value-type="string">
            <text:p>F COTIS START J. ACTIFS</text:p>
          </table:table-cell>
          <table:table-cell table:style-name="ce24" office:value-type="currency" office:currency="EUR" office:value="-5.5" calcext:value-type="currency">
            <text:p>-5,50 €</text:p>
          </table:table-cell>
          <table:table-cell table:style-name="ce21"/>
          <table:table-cell table:style-name="ce24" table:formula="of:=IF([.F23]&lt;&gt;&quot;NA&quot;;[.F23]+[.D24]+[.E24];&quot;NA&quot;)" office:value-type="currency" office:currency="EUR" office:value="-5.46000000000014" calcext:value-type="currency">
            <text:p>-5,46 €</text:p>
          </table:table-cell>
          <table:table-cell table:number-columns-repeated="58"/>
        </table:table-row>
        <table:table-row table:style-name="ro2">
          <table:table-cell table:number-columns-repeated="2" table:style-name="ce16" office:value-type="date" office:date-value="2020-09-08" calcext:value-type="date">
            <text:p>08/09/2020</text:p>
          </table:table-cell>
          <table:table-cell table:style-name="ce22" office:value-type="string" calcext:value-type="string">
            <text:p>PRLV SEPA PAYPAL EUROPE S.A.R.L 1010265381871 PAYPAL VIREMENT 1010265381871 PAYPAL</text:p>
          </table:table-cell>
          <table:table-cell table:style-name="ce25" office:value-type="currency" office:currency="EUR" office:value="-3.3" calcext:value-type="currency">
            <text:p>-3,30 €</text:p>
          </table:table-cell>
          <table:table-cell table:style-name="ce22"/>
          <table:table-cell table:style-name="ce25" table:formula="of:=IF([.F24]&lt;&gt;&quot;NA&quot;;[.F24]+[.D25]+[.E25];&quot;NA&quot;)" office:value-type="currency" office:currency="EUR" office:value="-8.76000000000014" calcext:value-type="currency">
            <text:p>-8,76 €</text:p>
          </table:table-cell>
          <table:table-cell table:number-columns-repeated="58"/>
        </table:table-row>
        <table:table-row table:style-name="ro1">
          <table:table-cell table:style-name="ce17" table:number-columns-spanned="6" table:number-rows-spanned="1"/>
          <table:covered-table-cell table:number-columns-repeated="5" table:style-name="ce17"/>
          <table:table-cell table:number-columns-repeated="58"/>
        </table:table-row>
        <table:table-row table:style-name="ro1">
          <table:table-cell table:style-name="ce12" table:number-columns-spanned="3" table:number-rows-spanned="1"/>
          <table:covered-table-cell table:number-columns-repeated="2" table:style-name="ce12"/>
          <table:table-cell table:style-name="ce23" office:value-type="string" calcext:value-type="string" table:number-columns-spanned="2" table:number-rows-spanned="1">
            <text:p>Solde au 12/09/2020 : </text:p>
          </table:table-cell>
          <table:covered-table-cell table:style-name="ce23" office:value-type="string" calcext:value-type="string">
            <text:p>Solde au 12/09/2020 : </text:p>
          </table:covered-table-cell>
          <table:table-cell table:style-name="ce26" office:value-type="currency" office:currency="EUR" office:value="-8.76" calcext:value-type="currency">
            <text:p>-8,76 €</text:p>
          </table:table-cell>
          <table:table-cell table:number-columns-repeated="58"/>
        </table:table-row>
        <table:table-row table:style-name="ro1">
          <table:table-cell table:style-name="ce18" office:value-type="string" calcext:value-type="string" table:number-columns-spanned="6" table:number-rows-spanned="1">
            <text:p><text:a xlink:href="#'Vos comptes'.A1" xlink:type="simple">Liste de vos comptes</text:a></text:p>
          </table: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table-cell table:number-columns-repeated="58"/>
        </table:table-row>
        <table:table-row table:style-name="ro1" table:number-rows-repeated="1048547">
          <table:table-cell table:number-columns-repeated="64"/>
        </table:table-row>
        <table:table-row table:style-name="ro1">
          <table:table-cell table:number-columns-repeated="64"/>
        </table:table-row>
        <table:named-expressions>
          <table:named-range table:name="_xlnm.Print_Area" table:base-cell-address="$'Vos comptes'.$A$1" table:cell-range-address="$'Cpt 14252 00020144101'.$A$1:.$F$28" table:range-usable-as="print-range"/>
        </table:named-expressions>
      </table:table>
      <table:table table:name="hidden" table:style-name="ta3">
        <table:table-column table:style-name="co9" table:default-cell-style-name="Default"/>
        <table:table-column table:style-name="co10" table:default-cell-style-name="Default"/>
        <table:table-column table:style-name="co11" table:default-cell-style-name="Default"/>
        <table:table-column table:style-name="co5" table:number-columns-repeated="61" table:default-cell-style-name="Default"/>
        <table:table-row table:style-name="ro1">
          <table:table-cell table:style-name="ce28" office:value-type="string" calcext:value-type="string">
            <text:p>Nombre de compte</text:p>
          </table:table-cell>
          <table:table-cell table:number-columns-repeated="63"/>
        </table:table-row>
        <table:table-row table:style-name="ro1">
          <table:table-cell table:style-name="ce29" office:value-type="string" calcext:value-type="string">
            <text:p>2</text:p>
          </table:table-cell>
          <table:table-cell table:number-columns-repeated="63"/>
        </table:table-row>
        <table:table-row table:style-name="ro1">
          <table:table-cell table:style-name="ce28" office:value-type="string" calcext:value-type="string">
            <text:p>Nom du compte</text:p>
          </table:table-cell>
          <table:table-cell table:style-name="ce28" office:value-type="string" calcext:value-type="string">
            <text:p>Range </text:p>
          </table:table-cell>
          <table:table-cell table:style-name="ce28" office:value-type="string" calcext:value-type="string">
            <text:p>Type</text:p>
          </table:table-cell>
          <table:table-cell table:number-columns-repeated="61"/>
        </table:table-row>
        <table:table-row table:style-name="ro1">
          <table:table-cell table:style-name="ce29" office:value-type="string" calcext:value-type="string">
            <text:p>Cpt 14252 00020144101</text:p>
          </table:table-cell>
          <table:table-cell table:style-name="ce29" office:value-type="string" calcext:value-type="string">
            <text:p>A6:E25</text:p>
          </table:table-cell>
          <table:table-cell table:style-name="ce29" office:value-type="string" calcext:value-type="string">
            <text:p>cpt</text:p>
          </table:table-cell>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text>   </number:text>
    </number:number-style>
    <number:number-style style:name="N117">
      <number:text>-</number:text>
      <number:number number:decimal-places="0" loext:min-decimal-places="0" number:min-integer-digits="1" number:grouping="true"/>
      <number:text>   </number:text>
      <style:map style:condition="value()&gt;=0" style:apply-style-name="N117P0"/>
    </number:number-style>
    <number:number-style style:name="N118P0" style:volatile="true">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 </number:text>
    </number:number-style>
    <number:number-style style:name="N124P1" style:volatile="true">
      <loext:text>-</loext:text>
      <loext:fill-character> </loext:fill-character>
      <number:number number:decimal-places="2" loext:min-decimal-places="2" number:min-integer-digits="1" number:grouping="true"/>
      <number:text> € </number:text>
    </number:number-style>
    <number:number-style style:name="N124P2" style:volatile="true">
      <loext:text> </loext:text>
      <loext:fill-character> </loext:fill-character>
      <number:text>-</number:text>
      <number:number number:decimal-places="0" loext:min-decimal-places="0" number:min-integer-digits="0"/>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29">
      <number:number number:decimal-places="2" loext:min-decimal-places="2" number:min-integer-digits="1" number:grouping="true"/>
      <number:text> </number:text>
      <number:currency-symbol number:language="ar">€</number:currency-symbol>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lob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262626"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er"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262626" style:text-outline="false" style:text-line-through-style="none" style:text-line-through-type="none" style:font-name="Verdana" fo:font-family="Verdana"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HyperLink_20_1" style:display-name="HyperLink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4170a9" style:text-outline="false" style:text-line-through-style="none" style:text-line-through-type="none" style:font-name="Verdana" fo:font-family="Verdana"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ableHeader" style:family="table-cell" style:parent-style-name="Default" style:data-style-name="N0">
      <style:table-cell-properties fo:background-color="#4173a9" style:cell-protect="protected" style:print-content="true" style:diagonal-bl-tr="none" style:diagonal-tl-br="none" style:text-align-source="fix" style:repeat-content="false" fo:wrap-option="no-wrap" fo:border="0.74pt solid #66666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Verdana" fo:font-family="Verdana"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loext: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2.499cm" fo:margin-bottom="2.499cm" fo:margin-left="1.9cm" fo:margin-right="1.9cm" style:print-page-order="ttb" style:first-page-number="continue" loext: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dden" style:display-name="PageStyle_hidden" style:page-layout-name="Mpm3">
      <style:header style:display="false"/>
      <style:header-left style:display="false"/>
      <style:footer style:display="false"/>
      <style:footer-left style:display="false"/>
    </style:master-page>
    <style:master-page style:name="PageStyle_5f_Cpt_20_14252_20_00020144101" style:display-name="PageStyle_Cpt 14252 00020144101" style:page-layout-name="Mpm4">
      <style:header style:display="false"/>
      <style:header-left style:display="false"/>
      <style:footer style:display="false"/>
      <style:footer-left style:display="false"/>
    </style:master-page>
    <style:master-page style:name="PageStyle_5f_Vos_20_comptes" style:display-name="PageStyle_Vos compt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30T15:07:59</meta:creation-date>
    <dc:date>2017-01-30T15:08:07</dc:date>
    <meta:generator>LibreOffice/6.4.4.2$Windows_X86_64 LibreOffice_project/3d775be2011f3886db32dfd395a6a6d1ca2630ff</meta:generator>
    <meta:document-statistic meta:table-count="3" meta:cell-count="157"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ormulaModule.xml><?xml version="1.0" encoding="utf-8"?>
<!DOCTYPE module  PUBLIC '-//OpenOffice.org//DTD OfficeDocument 1.0//EN'  'module.dtd'>
<script:module xmlns:script="http://openoffice.org/2000/script" script:name="FormulaModule" script:language="StarBasic" script:moduleType="normal">Rem Attribute VBA_ModuleType=VBAModule
Option VBASupport 1
Option Explicit

Private Formula As Dictionary

Private Function GetFormulaDict() As Dictionary

    If Formula Is Nothing Then
        Set Formula = New Dictionary
    End If

    Set GetFormulaDict = Formula

End Function


Public Function GetFormula(WorksheetName As String) As String
    
    If GetFormulaDict.Exists(WorksheetName) Then
        GetFormula = GetFormulaDict.Item(WorksheetName)
    Else
        GetFormula = ""
    End If

End Function

Public Sub SetFormula(WorksheetName As String, Formula As String)

    If GetFormulaDict.Exists(WorksheetName) Then
        GetFormulaDict.Remove (WorksheetName)
    End If
    
    GetFormulaDict.Add WorksheetName, Formula

End Sub


</script:module>
</file>

<file path=Basic/VBAProject/LastClickModule.xml><?xml version="1.0" encoding="utf-8"?>
<!DOCTYPE module  PUBLIC '-//OpenOffice.org//DTD OfficeDocument 1.0//EN'  'module.dtd'>
<script:module xmlns:script="http://openoffice.org/2000/script" script:name="LastClickModule" script:language="StarBasic" script:moduleType="normal">Rem Attribute VBA_ModuleType=VBAModule
Option VBASupport 1
Option Explicit

Private lastClick As Dictionary

Private Function GetLastClickDict() As Dictionary

    If lastClick Is Nothing Then
        Set lastClick = New Dictionary
    End If

    Set GetLastClickDict = lastClick

End Function


Public Function LastClickedCell(WorksheetName As String) As String
    
    If GetLastClickDict.Exists(WorksheetName) Then
        LastClickedCell = GetLastClickDict.Item(WorksheetName)
    Else
        LastClickedCell = ""
    End If

End Function

Public Sub SetClickedCell(WorksheetName As String, ClickedCell As String)

    If GetLastClickDict.Exists(WorksheetName) Then
        GetLastClickDict.Remove (WorksheetName)
    End If
    
    GetLastClickDict.Add WorksheetName, ClickedCell

End Sub

</script:module>
</file>

<file path=Basic/VBAProject/OrderingModule.xml><?xml version="1.0" encoding="utf-8"?>
<!DOCTYPE module  PUBLIC '-//OpenOffice.org//DTD OfficeDocument 1.0//EN'  'module.dtd'>
<script:module xmlns:script="http://openoffice.org/2000/script" script:name="OrderingModule" script:language="StarBasic" script:moduleType="normal">Rem Attribute VBA_ModuleType=VBAModule
Option VBASupport 1
Option Explicit

Private ordering As Dictionary

Private Function GetOrderingDict() As Dictionary

    If ordering Is Nothing Then
        Set ordering = New Dictionary
    End If

    Set GetOrderingDict = ordering

End Function

Public Function IsDescending(WorksheetName As String) As Boolean

    If GetOrderingDict.Exists(WorksheetName) And GetOrderingDict.Item(WorksheetName) = "desc" Then
        IsDescending = True
    Else
        IsDescending = False
    End If

End Function

Public Sub SetDescending(WorksheetName As String)

    If GetOrderingDict.Exists(WorksheetName) Then
        GetOrderingDict.Remove (WorksheetName)
    End If
    
    GetOrderingDict.Add WorksheetName, "desc"

End Sub

Public Sub SetAscending(WorksheetName As String)

    If GetOrderingDict.Exists(WorksheetName) Then
        GetOrderingDict.Remove (WorksheetName)
    End If
    
    GetOrderingDict.Add WorksheetName, "asc"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Option Explicit

Private Sub Workbook_SheetFollowHyperlink(ByVal Sh As Object, ByVal Target As Hyperlink)
    Dim pos, cellule
    
    pos = InStr(Target.SubAddress, "!")
    If (pos &gt; 0) Then
        cellule = Mid(Target.SubAddress, pos + 1, Len(Target.SubAddress) - pos)
        If (cellule &lt;&gt; "A1") Then
            
            Dim t As String
            Dim range As String
            
            t = GetAcccountType(Sh.Name)
            
            If (t = "cpt") Then
                SortCpt Sh.Name, cellule
            ElseIf (t = "cpt_1col") Then
                SortCpt1Col Sh.Name, cellule
            ElseIf (t = "cb") Then
                SortCb Sh.Name, cellule
            End If
        End If
    End If
    
End Sub

Public Function GetRange(WorksheetName As String) As String
    Dim count As Integer
        
    count = Worksheets("hidden").Cells(2, 1).Value
    
    Dim i As Integer
    For i = 3 To count + 2
        If Worksheets("hidden").Cells(i, 1).Value = WorksheetName Then
            GetRange = Worksheets("hidden").Cells(i, 2).Value
            Exit For
        End If
    Next
End Function

Private Function GetAcccountType(ByVal WorksheetName As String) As String
    Dim count As Integer
        
    count = Worksheets("hidden").Cells(2, 1).Value
    
    Dim i As Integer
    For i = 3 To count + 2
        If Worksheets("hidden").Cells(i, 1).Value = WorksheetName Then
            GetAcccountType = Worksheets("hidden").Cells(i, 3).Value
            Exit For
        End If
    Next
End Function


Private Sub SortCpt(ByVal WorksheetName As String, ByVal ClickedCell As String)
    If FormulaModule.GetFormula(WorksheetName) = "" Then
        FormulaModule.SetFormula WorksheetName, Worksheets(WorksheetName).Cells(6, 6).Formula
    End If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lseIf (ClickedCell = "D5") Then
        k1 = "D6": k2 = "A6": k3 = "B6"
    ElseIf (ClickedCell = "E5") Then
        k1 = "E6": k2 = "A6": k3 = "B6"
    End If
    
    
    Worksheets(WorksheetName).range(GetRange(WorksheetName)).Sort Key1:=range(k1), Order1:=modeTri, Key2:=range(k2), Order2:=modeTri, Key3:=range(k3), Order3:=modeTri, Header:=xlGuess, OrderCustom:=1, MatchCase:=False, Orientation:=xlTopToBottom
    
    If (IsDescending Or Asc(Left(ClickedCell, 1)) - 65 &gt; 1) Then
        Worksheets(WorksheetName).Cells(6, 6).Formula = "NA"
    Else
        Worksheets(WorksheetName).Cells(6, 6).Formula = FormulaModule.GetFormula(WorksheetName)
    End If
        
End Sub

Private Sub SortCpt1Col(ByVal WorksheetName As String, ByVal ClickedCell As String)
    If FormulaModule.GetFormula(WorksheetName) = "" Then
        FormulaModule.SetFormula WorksheetName, Worksheets(WorksheetName).Cells(6, 5).Formula
    End If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lseIf (ClickedCell = "D5") Then
        k1 = "D6": k2 = "A6": k3 = "B6"
    End If
     
    Worksheets(WorksheetName).range(GetRange(WorksheetName)).Sort Key1:=range(k1), Order1:=modeTri, Key2:=range(k2), Order2:=modeTri, Key3:=range(k3), Order3:=modeTri, Header:=xlGuess, OrderCustom:=1, MatchCase:=False, Orientation:=xlTopToBottom
    
    If (IsDescending Or Asc(Left(ClickedCell, 1)) - 65 &gt; 0) Then
        Worksheets(WorksheetName).Cells(6, 5).Formula = "NA"
    Else
        Worksheets(WorksheetName).Cells(6, 5).Formula = FormulaModule.GetFormula(WorksheetName)
    End If
End Sub

Private Sub SortCb(ByVal WorksheetName As String, ByVal ClickedCell As String)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nd If
        
    Dim r As Variant
    For Each r In Split(GetRange(WorksheetName), "|")
        Worksheets(WorksheetName).range(r).Sort Key1:=range(k1), Order1:=modeTri, Key2:=range(k2), Order2:=modeTri, Key3:=range(k3), Order3:=modeTri, Header:=xlGuess, OrderCustom:=1, MatchCase:=False, Orientation:=xlTopToBottom
    Next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ormulaModule"/>
  <library:element library:name="LastClickModule"/>
  <library:element library:name="OrderingModule"/>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