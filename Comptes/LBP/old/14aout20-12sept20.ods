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2.846cm"/>
    </style:style>
    <style:style style:name="co3" style:family="table-column">
      <style:table-column-properties fo:break-before="auto" style:column-width="3.064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14aout20-12sept20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 calcext:value-type="string">
            <text:p>Numéro Compte</text:p>
          </table:table-cell>
          <table:table-cell office:value-type="string" calcext:value-type="string">
            <text:p>1397348R032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CCP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Compte tenu en <text:s/></text:p>
          </table:table-cell>
          <table:table-cell office:value-type="string" calcext:value-type="string">
            <text:p>euro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ate <text:s text:c="11"/></text:p>
          </table:table-cell>
          <table:table-cell table:style-name="ce2" office:value-type="string" calcext:value-type="string">
            <text:p>12/09/202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olde (EUROS) <text:s text:c="2"/></text:p>
          </table:table-cell>
          <table:table-cell office:value-type="float" office:value="-216.81" calcext:value-type="float">
            <text:p>-216,8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olde (FRANCS) <text:s/></text:p>
          </table:table-cell>
          <table:table-cell office:value-type="float" office:value="-1422.18" calcext:value-type="float">
            <text:p>-1422,18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Montant(EUROS)</text:p>
          </table:table-cell>
          <table:table-cell office:value-type="string" calcext:value-type="string">
            <text:p>Montant(FRANC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/09/2020</text:p>
          </table:table-cell>
          <table:table-cell table:style-name="ce3" office:value-type="string" calcext:value-type="string">
            <text:p>VIREMENT POUR FREDERIC VIERA COMPTE FR76300040024300001883457 PAIEMENT LOYER SEPTEMBRE MIKAIL</text:p>
          </table:table-cell>
          <table:table-cell table:style-name="ce3" office:value-type="float" office:value="-391.01" calcext:value-type="float">
            <text:p>-391,01</text:p>
          </table:table-cell>
          <table:table-cell table:style-name="ce3" office:value-type="float" office:value="-2564.86" calcext:value-type="float">
            <text:p>-2564,86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10/09/2020</text:p>
          </table:table-cell>
          <table:table-cell office:value-type="string" calcext:value-type="string">
            <text:p>ACHAT CB INTERMARCHE BR 09.09.20 CARTE NUMERO <text:s text:c="15"/>742 <text:s/></text:p>
          </table:table-cell>
          <table:table-cell office:value-type="float" office:value="-65.95" calcext:value-type="float">
            <text:p>-65,95</text:p>
          </table:table-cell>
          <table:table-cell office:value-type="float" office:value="-432.6" calcext:value-type="float">
            <text:p>-432,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/09/2020</text:p>
          </table:table-cell>
          <table:table-cell table:style-name="ce3" office:value-type="string" calcext:value-type="string">
            <text:p>ACHAT CB AMAZON EU SARL 08.09.20 CARTE NUMERO <text:s text:c="15"/>742 <text:s/></text:p>
          </table:table-cell>
          <table:table-cell table:style-name="ce3" office:value-type="float" office:value="-28.99" calcext:value-type="float">
            <text:p>-28,99</text:p>
          </table:table-cell>
          <table:table-cell table:style-name="ce3" office:value-type="float" office:value="-190.16" calcext:value-type="float">
            <text:p>-190,16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9/09/2020</text:p>
          </table:table-cell>
          <table:table-cell office:value-type="string" calcext:value-type="string">
            <text:p>VIREMENT PERMANENT POUR FREDERIC VIERA COMPTE FR76300040024300001883457 REFERENCE : 0226253000005842</text:p>
          </table:table-cell>
          <table:table-cell office:value-type="float" office:value="-400" calcext:value-type="float">
            <text:p>-400</text:p>
          </table:table-cell>
          <table:table-cell office:value-type="float" office:value="-2623.83" calcext:value-type="float">
            <text:p>-2623,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9/09/2020</text:p>
          </table:table-cell>
          <table:table-cell table:style-name="ce3" office:value-type="string" calcext:value-type="string">
            <text:p>ACHAT CB STEAMGAMES.COM 06.09.20 CARTE NUMERO <text:s text:c="15"/>742 <text:s/></text:p>
          </table:table-cell>
          <table:table-cell table:style-name="ce3" office:value-type="float" office:value="-2.99" calcext:value-type="float">
            <text:p>-2,99</text:p>
          </table:table-cell>
          <table:table-cell table:style-name="ce3" office:value-type="float" office:value="-19.61" calcext:value-type="float">
            <text:p>-19,61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8/09/2020</text:p>
          </table:table-cell>
          <table:table-cell office:value-type="string" calcext:value-type="string">
            <text:p>VIREMENT POUR FREDERIC VIERA COMPTE FR76300040024300001883457 LOYER GARAGE</text:p>
          </table:table-cell>
          <table:table-cell office:value-type="float" office:value="-65" calcext:value-type="float">
            <text:p>-65</text:p>
          </table:table-cell>
          <table:table-cell office:value-type="float" office:value="-426.37" calcext:value-type="float">
            <text:p>-426,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/09/2020</text:p>
          </table:table-cell>
          <table:table-cell table:style-name="ce3" office:value-type="string" calcext:value-type="string">
            <text:p>VIREMENT POUR MAGIC CARD MARKET COMPTE DE80100400000107541500 HERMYX-98774</text:p>
          </table:table-cell>
          <table:table-cell table:style-name="ce3" office:value-type="float" office:value="-30" calcext:value-type="float">
            <text:p>-30</text:p>
          </table:table-cell>
          <table:table-cell table:style-name="ce3" office:value-type="float" office:value="-196.79" calcext:value-type="float">
            <text:p>-196,79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8/09/2020</text:p>
          </table:table-cell>
          <table:table-cell office:value-type="string" calcext:value-type="string">
            <text:p>ACHAT CB IKEA <text:s text:c="10"/>07.09.20 CARTE NUMERO <text:s text:c="15"/>742 <text:s/></text:p>
          </table:table-cell>
          <table:table-cell office:value-type="float" office:value="-363.99" calcext:value-type="float">
            <text:p>-363,99</text:p>
          </table:table-cell>
          <table:table-cell office:value-type="float" office:value="-2387.62" calcext:value-type="float">
            <text:p>-2387,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/09/2020</text:p>
          </table:table-cell>
          <table:table-cell table:style-name="ce3" office:value-type="string" calcext:value-type="string">
            <text:p>ACHAT CB LEROY MERLIN <text:s text:c="2"/>07.09.20 CARTE NUMERO <text:s text:c="15"/>742 <text:s/></text:p>
          </table:table-cell>
          <table:table-cell table:style-name="ce3" office:value-type="float" office:value="-18.25" calcext:value-type="float">
            <text:p>-18,25</text:p>
          </table:table-cell>
          <table:table-cell table:style-name="ce3" office:value-type="float" office:value="-119.71" calcext:value-type="float">
            <text:p>-119,71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7/09/2020</text:p>
          </table:table-cell>
          <table:table-cell office:value-type="string" calcext:value-type="string">
            <text:p>PRELEVEMENT DE Credit Agricole I bilier Services REF : 6536460 Appel Sept. Appel Sept.</text:p>
          </table:table-cell>
          <table:table-cell office:value-type="float" office:value="-37.53" calcext:value-type="float">
            <text:p>-37,53</text:p>
          </table:table-cell>
          <table:table-cell office:value-type="float" office:value="-246.18" calcext:value-type="float">
            <text:p>-246,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7/09/2020</text:p>
          </table:table-cell>
          <table:table-cell table:style-name="ce3" office:value-type="string" calcext:value-type="string">
            <text:p>PRELEVEMENT DE CARE REF : NR 000007900980 NC 488681 CARE 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-65.6" calcext:value-type="float">
            <text:p>-65,6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7/09/2020</text:p>
          </table:table-cell>
          <table:table-cell office:value-type="string" calcext:value-type="string">
            <text:p>ACHAT CB LECLERC <text:s text:c="7"/>05.09.20 CARTE NUMERO <text:s text:c="15"/>742 <text:s/></text:p>
          </table:table-cell>
          <table:table-cell office:value-type="float" office:value="-65.44" calcext:value-type="float">
            <text:p>-65,44</text:p>
          </table:table-cell>
          <table:table-cell office:value-type="float" office:value="-429.26" calcext:value-type="float">
            <text:p>-429,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7/09/2020</text:p>
          </table:table-cell>
          <table:table-cell table:style-name="ce3" office:value-type="string" calcext:value-type="string">
            <text:p>ACHAT CB SARL BALBEK <text:s text:c="3"/>05.09.20 CARTE NUMERO <text:s text:c="15"/>742 <text:s/>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-65.6" calcext:value-type="float">
            <text:p>-65,6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4/09/2020</text:p>
          </table:table-cell>
          <table:table-cell office:value-type="string" calcext:value-type="string">
            <text:p>ACHAT CB IKEA <text:s text:c="10"/>03.09.20 CARTE NUMERO <text:s text:c="15"/>742 <text:s/></text:p>
          </table:table-cell>
          <table:table-cell office:value-type="float" office:value="-36.47" calcext:value-type="float">
            <text:p>-36,47</text:p>
          </table:table-cell>
          <table:table-cell office:value-type="float" office:value="-239.23" calcext:value-type="float">
            <text:p>-239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/09/2020</text:p>
          </table:table-cell>
          <table:table-cell table:style-name="ce3" office:value-type="string" calcext:value-type="string">
            <text:p>ACHAT CB DECATHLON <text:s text:c="5"/>03.09.20 CARTE NUMERO <text:s text:c="15"/>742 <text:s/></text:p>
          </table:table-cell>
          <table:table-cell table:style-name="ce3" office:value-type="float" office:value="-23" calcext:value-type="float">
            <text:p>-23</text:p>
          </table:table-cell>
          <table:table-cell table:style-name="ce3" office:value-type="float" office:value="-150.87" calcext:value-type="float">
            <text:p>-150,87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4/09/2020</text:p>
          </table:table-cell>
          <table:table-cell office:value-type="string" calcext:value-type="string">
            <text:p>ACHAT CB CINEMA LES STU 03.09.20 CARTE NUMERO <text:s text:c="15"/>742 <text:s/></text:p>
          </table:table-cell>
          <table:table-cell office:value-type="float" office:value="-14.5" calcext:value-type="float">
            <text:p>-14,5</text:p>
          </table:table-cell>
          <table:table-cell office:value-type="float" office:value="-95.11" calcext:value-type="float">
            <text:p>-95,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/09/2020</text:p>
          </table:table-cell>
          <table:table-cell table:style-name="ce3" office:value-type="string" calcext:value-type="string">
            <text:p>ACHAT CB DECATHLON FRAN 02.09.20 EUR <text:s text:c="8"/>13,00 CARTE NO <text:s/>742 <text:s/></text:p>
          </table:table-cell>
          <table:table-cell table:style-name="ce3" office:value-type="float" office:value="-13" calcext:value-type="float">
            <text:p>-13</text:p>
          </table:table-cell>
          <table:table-cell table:style-name="ce3" office:value-type="float" office:value="-85.27" calcext:value-type="float">
            <text:p>-85,27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3/09/2020</text:p>
          </table:table-cell>
          <table:table-cell office:value-type="string" calcext:value-type="string">
            <text:p>ACHAT CB INTERMARCHE BR 02.09.20 CARTE NUMERO <text:s text:c="15"/>742 <text:s/></text:p>
          </table:table-cell>
          <table:table-cell office:value-type="float" office:value="-24.12" calcext:value-type="float">
            <text:p>-24,12</text:p>
          </table:table-cell>
          <table:table-cell office:value-type="float" office:value="-158.22" calcext:value-type="float">
            <text:p>-158,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/09/2020</text:p>
          </table:table-cell>
          <table:table-cell table:style-name="ce3" office:value-type="string" calcext:value-type="string">
            <text:p>ACHAT CB LECLERC <text:s text:c="7"/>02.09.20 CARTE NUMERO <text:s text:c="15"/>742 <text:s/></text:p>
          </table:table-cell>
          <table:table-cell table:style-name="ce3" office:value-type="float" office:value="-7.58" calcext:value-type="float">
            <text:p>-7,58</text:p>
          </table:table-cell>
          <table:table-cell table:style-name="ce3" office:value-type="float" office:value="-49.72" calcext:value-type="float">
            <text:p>-49,72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2/09/2020</text:p>
          </table:table-cell>
          <table:table-cell office:value-type="string" calcext:value-type="string">
            <text:p>VIREMENT POUR MAGIC CARD MARKET COMPTE DE80100400000107541500 HERMYX-98774</text:p>
          </table:table-cell>
          <table:table-cell office:value-type="float" office:value="-9.96" calcext:value-type="float">
            <text:p>-9,96</text:p>
          </table:table-cell>
          <table:table-cell office:value-type="float" office:value="-65.33" calcext:value-type="float">
            <text:p>-65,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2/09/2020</text:p>
          </table:table-cell>
          <table:table-cell table:style-name="ce3" office:value-type="string" calcext:value-type="string">
            <text:p>ACHAT CB NECTAR IN <text:s text:c="5"/>01.09.20 CARTE NUMERO <text:s text:c="15"/>742 <text:s/></text:p>
          </table:table-cell>
          <table:table-cell table:style-name="ce3" office:value-type="float" office:value="-19.75" calcext:value-type="float">
            <text:p>-19,75</text:p>
          </table:table-cell>
          <table:table-cell table:style-name="ce3" office:value-type="float" office:value="-129.55" calcext:value-type="float">
            <text:p>-129,55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2/09/2020</text:p>
          </table:table-cell>
          <table:table-cell office:value-type="string" calcext:value-type="string">
            <text:p>ACHAT CB SOIF DE VINS <text:s text:c="2"/>01.09.20 CARTE NUMERO <text:s text:c="15"/>742 <text:s/></text:p>
          </table:table-cell>
          <table:table-cell office:value-type="float" office:value="-9.1" calcext:value-type="float">
            <text:p>-9,1</text:p>
          </table:table-cell>
          <table:table-cell office:value-type="float" office:value="-59.69" calcext:value-type="float">
            <text:p>-59,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2/09/2020</text:p>
          </table:table-cell>
          <table:table-cell table:style-name="ce3" office:value-type="string" calcext:value-type="string">
            <text:p>ACHAT CB LIBRAIRIE DIAL 01.09.20 CARTE NUMERO <text:s text:c="15"/>742 <text:s/></text:p>
          </table:table-cell>
          <table:table-cell table:style-name="ce3" office:value-type="float" office:value="-7.9" calcext:value-type="float">
            <text:p>-7,9</text:p>
          </table:table-cell>
          <table:table-cell table:style-name="ce3" office:value-type="float" office:value="-51.82" calcext:value-type="float">
            <text:p>-51,82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2/09/2020</text:p>
          </table:table-cell>
          <table:table-cell office:value-type="string" calcext:value-type="string">
            <text:p>ACHAT CB YFOG <text:s text:c="10"/>01.09.20 CARTE NUMERO <text:s text:c="15"/>742 <text:s/></text:p>
          </table:table-cell>
          <table:table-cell office:value-type="float" office:value="-7.2" calcext:value-type="float">
            <text:p>-7,2</text:p>
          </table:table-cell>
          <table:table-cell office:value-type="float" office:value="-47.23" calcext:value-type="float">
            <text:p>-47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2/09/2020</text:p>
          </table:table-cell>
          <table:table-cell table:style-name="ce3" office:value-type="string" calcext:value-type="string">
            <text:p>ACHAT CB MISTINGUETTE <text:s text:c="2"/>01.09.20 CARTE NUMERO <text:s text:c="15"/>742 <text:s/></text:p>
          </table:table-cell>
          <table:table-cell table:style-name="ce3" office:value-type="float" office:value="-5.49" calcext:value-type="float">
            <text:p>-5,49</text:p>
          </table:table-cell>
          <table:table-cell table:style-name="ce3" office:value-type="float" office:value="-36.01" calcext:value-type="float">
            <text:p>-36,01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2/09/2020</text:p>
          </table:table-cell>
          <table:table-cell office:value-type="string" calcext:value-type="string">
            <text:p>VIREMENT DE M DEMIRDELEN MIKAIL VU02454GDM45C801 VIR DE M DEMIRDELEN MIKAIL REFERENCE : 0190246000073025</text:p>
          </table:table-cell>
          <table:table-cell office:value-type="float" office:value="700" calcext:value-type="float">
            <text:p>700</text:p>
          </table:table-cell>
          <table:table-cell office:value-type="float" office:value="4591.7" calcext:value-type="float">
            <text:p>4591,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2/09/2020</text:p>
          </table:table-cell>
          <table:table-cell table:style-name="ce3" office:value-type="string" calcext:value-type="string">
            <text:p>VIREMENT DE MLE MARCHAND MAELISS REFERENCE : 0181246080018631 <text:s/>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5247.66" calcext:value-type="float">
            <text:p>5247,66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1/09/2020</text:p>
          </table:table-cell>
          <table:table-cell office:value-type="string" calcext:value-type="string">
            <text:p>ACHAT CB LA TOMATE <text:s text:c="5"/>31.08.20 CARTE NUMERO <text:s text:c="15"/>742 <text:s/></text:p>
          </table:table-cell>
          <table:table-cell office:value-type="float" office:value="-59.4" calcext:value-type="float">
            <text:p>-59,4</text:p>
          </table:table-cell>
          <table:table-cell office:value-type="float" office:value="-389.64" calcext:value-type="float">
            <text:p>-389,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/09/2020</text:p>
          </table:table-cell>
          <table:table-cell table:style-name="ce3" office:value-type="string" calcext:value-type="string">
            <text:p>ACHAT CB SAHIN <text:s text:c="9"/>31.08.20 CARTE NUMERO <text:s text:c="15"/>742 <text:s/></text:p>
          </table:table-cell>
          <table:table-cell table:style-name="ce3" office:value-type="float" office:value="-25.64" calcext:value-type="float">
            <text:p>-25,64</text:p>
          </table:table-cell>
          <table:table-cell table:style-name="ce3" office:value-type="float" office:value="-168.19" calcext:value-type="float">
            <text:p>-168,19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01/09/2020</text:p>
          </table:table-cell>
          <table:table-cell office:value-type="string" calcext:value-type="string">
            <text:p>ACHAT CB CARREFOUR <text:s text:c="5"/>31.08.20 CARTE NUMERO <text:s text:c="15"/>742 <text:s/></text:p>
          </table:table-cell>
          <table:table-cell office:value-type="float" office:value="-16.83" calcext:value-type="float">
            <text:p>-16,83</text:p>
          </table:table-cell>
          <table:table-cell office:value-type="float" office:value="-110.4" calcext:value-type="float">
            <text:p>-110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/09/2020</text:p>
          </table:table-cell>
          <table:table-cell table:style-name="ce3" office:value-type="string" calcext:value-type="string">
            <text:p>ACHAT CB CARREFOUR <text:s text:c="5"/>31.08.20 CARTE NUMERO <text:s text:c="15"/>742 <text:s/></text:p>
          </table:table-cell>
          <table:table-cell table:style-name="ce3" office:value-type="float" office:value="-2.41" calcext:value-type="float">
            <text:p>-2,41</text:p>
          </table:table-cell>
          <table:table-cell table:style-name="ce3" office:value-type="float" office:value="-15.81" calcext:value-type="float">
            <text:p>-15,81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31/08/2020</text:p>
          </table:table-cell>
          <table:table-cell office:value-type="string" calcext:value-type="string">
            <text:p>ACHAT CB BRICO DEPOT <text:s text:c="3"/>29.08.20 CARTE NUMERO <text:s text:c="15"/>742 <text:s/></text:p>
          </table:table-cell>
          <table:table-cell office:value-type="float" office:value="-27.3" calcext:value-type="float">
            <text:p>-27,3</text:p>
          </table:table-cell>
          <table:table-cell office:value-type="float" office:value="-179.08" calcext:value-type="float">
            <text:p>-179,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1/08/2020</text:p>
          </table:table-cell>
          <table:table-cell table:style-name="ce3" office:value-type="string" calcext:value-type="string">
            <text:p>ACHAT CB LA HUBLAIS <text:s text:c="4"/>28.08.20 CARTE NUMERO <text:s text:c="15"/>742 <text:s/></text:p>
          </table:table-cell>
          <table:table-cell table:style-name="ce3" office:value-type="float" office:value="-12.5" calcext:value-type="float">
            <text:p>-12,5</text:p>
          </table:table-cell>
          <table:table-cell table:style-name="ce3" office:value-type="float" office:value="-81.99" calcext:value-type="float">
            <text:p>-81,99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31/08/2020</text:p>
          </table:table-cell>
          <table:table-cell office:value-type="string" calcext:value-type="string">
            <text:p>ACHAT CB PADRO CRF CITY 29.08.20 CARTE NUMERO <text:s text:c="15"/>742 <text:s/></text:p>
          </table:table-cell>
          <table:table-cell office:value-type="float" office:value="-8.47" calcext:value-type="float">
            <text:p>-8,47</text:p>
          </table:table-cell>
          <table:table-cell office:value-type="float" office:value="-55.56" calcext:value-type="float">
            <text:p>-55,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1/08/2020</text:p>
          </table:table-cell>
          <table:table-cell table:style-name="ce3" office:value-type="string" calcext:value-type="string">
            <text:p>ACHAT CB PADRO CRF CITY 29.08.20 CARTE NUMERO <text:s text:c="15"/>742 <text:s/></text:p>
          </table:table-cell>
          <table:table-cell table:style-name="ce3" office:value-type="float" office:value="-7.49" calcext:value-type="float">
            <text:p>-7,49</text:p>
          </table:table-cell>
          <table:table-cell table:style-name="ce3" office:value-type="float" office:value="-49.13" calcext:value-type="float">
            <text:p>-49,13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31/08/2020</text:p>
          </table:table-cell>
          <table:table-cell office:value-type="string" calcext:value-type="string">
            <text:p>ACHAT CB PADRO CRF CITY 29.08.20 CARTE NUMERO <text:s text:c="15"/>742 <text:s/></text:p>
          </table:table-cell>
          <table:table-cell office:value-type="float" office:value="-7.17" calcext:value-type="float">
            <text:p>-7,17</text:p>
          </table:table-cell>
          <table:table-cell office:value-type="float" office:value="-47.03" calcext:value-type="float">
            <text:p>-47,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1/08/2020</text:p>
          </table:table-cell>
          <table:table-cell table:style-name="ce3" office:value-type="string" calcext:value-type="string">
            <text:p>ACHAT CB PADRO CRF CITY 30.08.20 CARTE NUMERO <text:s text:c="15"/>742 <text:s/></text:p>
          </table:table-cell>
          <table:table-cell table:style-name="ce3" office:value-type="float" office:value="-4.11" calcext:value-type="float">
            <text:p>-4,11</text:p>
          </table:table-cell>
          <table:table-cell table:style-name="ce3" office:value-type="float" office:value="-26.96" calcext:value-type="float">
            <text:p>-26,96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31/08/2020</text:p>
          </table:table-cell>
          <table:table-cell office:value-type="string" calcext:value-type="string">
            <text:p>ACHAT CB PADRO CRF CITY 29.08.20 CARTE NUMERO <text:s text:c="15"/>742 <text:s/></text:p>
          </table:table-cell>
          <table:table-cell office:value-type="float" office:value="-1.42" calcext:value-type="float">
            <text:p>-1,42</text:p>
          </table:table-cell>
          <table:table-cell office:value-type="float" office:value="-9.31" calcext:value-type="float">
            <text:p>-9,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1/08/2020</text:p>
          </table:table-cell>
          <table:table-cell table:style-name="ce3" office:value-type="string" calcext:value-type="string">
            <text:p>VIREMENT DE MLE MARCHAND MAELISS REFERENCE : 0181242040021797 <text:s/>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83.94" calcext:value-type="float">
            <text:p>983,94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27/08/2020</text:p>
          </table:table-cell>
          <table:table-cell office:value-type="string" calcext:value-type="string">
            <text:p>ACHAT CB GAMEFOUND COM <text:s/>25.08.20 EUR <text:s text:c="8"/>21,84 CARTE NO <text:s/>742 <text:s/></text:p>
          </table:table-cell>
          <table:table-cell office:value-type="float" office:value="-21.84" calcext:value-type="float">
            <text:p>-21,84</text:p>
          </table:table-cell>
          <table:table-cell office:value-type="float" office:value="-143.26" calcext:value-type="float">
            <text:p>-143,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/08/2020</text:p>
          </table:table-cell>
          <table:table-cell table:style-name="ce3" office:value-type="string" calcext:value-type="string">
            <text:p>ACHAT CB NETFLIX COM <text:s text:c="3"/>26.08.20 CARTE NUMERO <text:s text:c="15"/>742 <text:s/></text:p>
          </table:table-cell>
          <table:table-cell table:style-name="ce3" office:value-type="float" office:value="-7.99" calcext:value-type="float">
            <text:p>-7,99</text:p>
          </table:table-cell>
          <table:table-cell table:style-name="ce3" office:value-type="float" office:value="-52.41" calcext:value-type="float">
            <text:p>-52,41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26/08/2020</text:p>
          </table:table-cell>
          <table:table-cell office:value-type="string" calcext:value-type="string">
            <text:p>VIREMENT DE SAMMELKARTENMARKT LT UND 98774-5f452a055896b CARDMARKET.COM RETRAIT .........</text:p>
          </table:table-cell>
          <table:table-cell office:value-type="float" office:value="30.65" calcext:value-type="float">
            <text:p>30,65</text:p>
          </table:table-cell>
          <table:table-cell office:value-type="float" office:value="201.05" calcext:value-type="float">
            <text:p>201,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/08/2020</text:p>
          </table:table-cell>
          <table:table-cell table:style-name="ce3" office:value-type="string" calcext:value-type="string">
            <text:p>VIREMENT POUR DUDE JULIEN COMPTE FR76166060001984846328210 TPDC</text:p>
          </table:table-cell>
          <table:table-cell table:style-name="ce3" office:value-type="float" office:value="-22" calcext:value-type="float">
            <text:p>-22</text:p>
          </table:table-cell>
          <table:table-cell table:style-name="ce3" office:value-type="float" office:value="-144.31" calcext:value-type="float">
            <text:p>-144,31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25/08/2020</text:p>
          </table:table-cell>
          <table:table-cell office:value-type="string" calcext:value-type="string">
            <text:p>PRELEVEMENT DE LA POSTE TELECOM REF : IN0134644053 IDENT : FR94ZZZ404069 MANDAT : 4007702945</text:p>
          </table:table-cell>
          <table:table-cell office:value-type="float" office:value="-9.99" calcext:value-type="float">
            <text:p>-9,99</text:p>
          </table:table-cell>
          <table:table-cell office:value-type="float" office:value="-65.53" calcext:value-type="float">
            <text:p>-65,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/08/2020</text:p>
          </table:table-cell>
          <table:table-cell table:style-name="ce3" office:value-type="string" calcext:value-type="string">
            <text:p>VIREMENT POUR DUFOUR WILLIAM COMPTE FR76179060011200072984800 REMBOURSEMENT FRAIS CAMION</text:p>
          </table:table-cell>
          <table:table-cell table:style-name="ce3" office:value-type="float" office:value="-250" calcext:value-type="float">
            <text:p>-250</text:p>
          </table:table-cell>
          <table:table-cell table:style-name="ce3" office:value-type="float" office:value="-1639.89" calcext:value-type="float">
            <text:p>-1639,89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24/08/2020</text:p>
          </table:table-cell>
          <table:table-cell office:value-type="string" calcext:value-type="string">
            <text:p>ACHAT CB BURGER KING <text:s text:c="3"/>21.08.20 CARTE NUMERO <text:s text:c="15"/>742 <text:s/></text:p>
          </table:table-cell>
          <table:table-cell office:value-type="float" office:value="-21.6" calcext:value-type="float">
            <text:p>-21,6</text:p>
          </table:table-cell>
          <table:table-cell office:value-type="float" office:value="-141.69" calcext:value-type="float">
            <text:p>-141,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/08/2020</text:p>
          </table:table-cell>
          <table:table-cell table:style-name="ce3" office:value-type="string" calcext:value-type="string">
            <text:p>ACHAT CB PADRO CRF CITY 22.08.20 CARTE NUMERO <text:s text:c="15"/>742 <text:s/></text:p>
          </table:table-cell>
          <table:table-cell table:style-name="ce3" office:value-type="float" office:value="-9.98" calcext:value-type="float">
            <text:p>-9,98</text:p>
          </table:table-cell>
          <table:table-cell table:style-name="ce3" office:value-type="float" office:value="-65.46" calcext:value-type="float">
            <text:p>-65,46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24/08/2020</text:p>
          </table:table-cell>
          <table:table-cell office:value-type="string" calcext:value-type="string">
            <text:p>ACHAT CB BOULANGERIE CH 22.08.20 CARTE NUMERO <text:s text:c="15"/>742 <text:s/></text:p>
          </table:table-cell>
          <table:table-cell office:value-type="float" office:value="-7.6" calcext:value-type="float">
            <text:p>-7,6</text:p>
          </table:table-cell>
          <table:table-cell office:value-type="float" office:value="-49.85" calcext:value-type="float">
            <text:p>-49,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/08/2020</text:p>
          </table:table-cell>
          <table:table-cell table:style-name="ce3" office:value-type="string" calcext:value-type="string">
            <text:p>ACHAT CB MAC DONALD S <text:s text:c="2"/>22.08.20 CARTE NUMERO <text:s text:c="15"/>742 <text:s/></text:p>
          </table:table-cell>
          <table:table-cell table:style-name="ce3" office:value-type="float" office:value="-2.8" calcext:value-type="float">
            <text:p>-2,8</text:p>
          </table:table-cell>
          <table:table-cell table:style-name="ce3" office:value-type="float" office:value="-18.37" calcext:value-type="float">
            <text:p>-18,37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24/08/2020</text:p>
          </table:table-cell>
          <table:table-cell office:value-type="string" calcext:value-type="string">
            <text:p>VIREMENT DE MLE MARCHAND MAELISS REFERENCE : 0181236050000201 <text:s/></text:p>
          </table:table-cell>
          <table:table-cell office:value-type="float" office:value="350" calcext:value-type="float">
            <text:p>350</text:p>
          </table:table-cell>
          <table:table-cell office:value-type="float" office:value="2295.85" calcext:value-type="float">
            <text:p>2295,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/08/2020</text:p>
          </table:table-cell>
          <table:table-cell table:style-name="ce3" office:value-type="string" calcext:value-type="string">
            <text:p>ACHAT CB LECLERC <text:s text:c="7"/>20.08.20 CARTE NUMERO <text:s text:c="15"/>742 <text:s/></text:p>
          </table:table-cell>
          <table:table-cell table:style-name="ce3" office:value-type="float" office:value="-11" calcext:value-type="float">
            <text:p>-11</text:p>
          </table:table-cell>
          <table:table-cell table:style-name="ce3" office:value-type="float" office:value="-72.16" calcext:value-type="float">
            <text:p>-72,16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20/08/2020</text:p>
          </table:table-cell>
          <table:table-cell office:value-type="string" calcext:value-type="string">
            <text:p>VIREMENT PERMANENT POUR ALTERNATIVES ET LIBERTES COMPTE FR4820041010130610231S034 REFERENCE : 0226233000000741</text:p>
          </table:table-cell>
          <table:table-cell office:value-type="float" office:value="-10" calcext:value-type="float">
            <text:p>-10</text:p>
          </table:table-cell>
          <table:table-cell office:value-type="float" office:value="-65.6" calcext:value-type="float">
            <text:p>-65,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/08/2020</text:p>
          </table:table-cell>
          <table:table-cell table:style-name="ce3" office:value-type="string" calcext:value-type="string">
            <text:p>PRELEVEMENT DE EDF clients parti iers REF : Z023883400165 11403 1 S 114</text:p>
          </table:table-cell>
          <table:table-cell table:style-name="ce3" office:value-type="float" office:value="-72.72" calcext:value-type="float">
            <text:p>-72,72</text:p>
          </table:table-cell>
          <table:table-cell table:style-name="ce3" office:value-type="float" office:value="-477.01" calcext:value-type="float">
            <text:p>-477,01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20/08/2020</text:p>
          </table:table-cell>
          <table:table-cell office:value-type="string" calcext:value-type="string">
            <text:p>PRELEVEMENT DE BOUYGUES TELECOM YGUES TELECOM REF : PAGP0100NFCUQ7 09xxxxx513</text:p>
          </table:table-cell>
          <table:table-cell office:value-type="float" office:value="-32.99" calcext:value-type="float">
            <text:p>-32,99</text:p>
          </table:table-cell>
          <table:table-cell office:value-type="float" office:value="-216.4" calcext:value-type="float">
            <text:p>-216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/08/2020</text:p>
          </table:table-cell>
          <table:table-cell table:style-name="ce3" office:value-type="string" calcext:value-type="string">
            <text:p>ACHAT CB DELIVEROO.FR <text:s text:c="2"/>19.08.20 CARTE NUMERO <text:s text:c="15"/>742 <text:s/>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419.81" calcext:value-type="float">
            <text:p>-419,81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20/08/2020</text:p>
          </table:table-cell>
          <table:table-cell office:value-type="string" calcext:value-type="string">
            <text:p>ACHAT CB INTERMARCHE BR 19.08.20 CARTE NUMERO <text:s text:c="15"/>742 <text:s/></text:p>
          </table:table-cell>
          <table:table-cell office:value-type="float" office:value="-56.53" calcext:value-type="float">
            <text:p>-56,53</text:p>
          </table:table-cell>
          <table:table-cell office:value-type="float" office:value="-370.81" calcext:value-type="float">
            <text:p>-370,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/08/2020</text:p>
          </table:table-cell>
          <table:table-cell table:style-name="ce3" office:value-type="string" calcext:value-type="string">
            <text:p>VIREMENT POUR MLE MARCHAND MAELISS COMPTE 20041010111117933D03258 REFERENCE : 015523107089441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524.77" calcext:value-type="float">
            <text:p>-524,77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18/08/2020</text:p>
          </table:table-cell>
          <table:table-cell office:value-type="string" calcext:value-type="string">
            <text:p>ACHAT CB PADRO CRF CITY 17.08.20 CARTE NUMERO <text:s text:c="15"/>742 <text:s/></text:p>
          </table:table-cell>
          <table:table-cell office:value-type="float" office:value="-7.88" calcext:value-type="float">
            <text:p>-7,88</text:p>
          </table:table-cell>
          <table:table-cell office:value-type="float" office:value="-51.69" calcext:value-type="float">
            <text:p>-51,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/08/2020</text:p>
          </table:table-cell>
          <table:table-cell table:style-name="ce3" office:value-type="string" calcext:value-type="string">
            <text:p>VIREMENT POUR FREDERIC VIERA COMPTE FR76300040024300001883457 PAIEMENT LOYER AOUT MIKAIL ET MA</text:p>
          </table:table-cell>
          <table:table-cell table:style-name="ce3" office:value-type="float" office:value="-200" calcext:value-type="float">
            <text:p>-200</text:p>
          </table:table-cell>
          <table:table-cell table:style-name="ce3" office:value-type="float" office:value="-1311.91" calcext:value-type="float">
            <text:p>-1311,91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17/08/2020</text:p>
          </table:table-cell>
          <table:table-cell office:value-type="string" calcext:value-type="string">
            <text:p>VIREMENT POUR FREDERIC VIERA COMPTE FR76300040024300001883457 PAIEMENT GARAGE AOUT</text:p>
          </table:table-cell>
          <table:table-cell office:value-type="float" office:value="-32.5" calcext:value-type="float">
            <text:p>-32,5</text:p>
          </table:table-cell>
          <table:table-cell office:value-type="float" office:value="-213.19" calcext:value-type="float">
            <text:p>-213,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/08/2020</text:p>
          </table:table-cell>
          <table:table-cell table:style-name="ce3" office:value-type="string" calcext:value-type="string">
            <text:p>ACHAT CB PADRO CRF CITY 15.08.20 CARTE NUMERO <text:s text:c="15"/>742 <text:s/></text:p>
          </table:table-cell>
          <table:table-cell table:style-name="ce3" office:value-type="float" office:value="-11.28" calcext:value-type="float">
            <text:p>-11,28</text:p>
          </table:table-cell>
          <table:table-cell table:style-name="ce3" office:value-type="float" office:value="-73.99" calcext:value-type="float">
            <text:p>-73,99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17/08/2020</text:p>
          </table:table-cell>
          <table:table-cell office:value-type="string" calcext:value-type="string">
            <text:p>ACHAT CB BRIVIN <text:s text:c="8"/>14.08.20 CARTE NUMERO <text:s text:c="15"/>742 <text:s/></text:p>
          </table:table-cell>
          <table:table-cell office:value-type="float" office:value="-3.3" calcext:value-type="float">
            <text:p>-3,3</text:p>
          </table:table-cell>
          <table:table-cell office:value-type="float" office:value="-21.65" calcext:value-type="float">
            <text:p>-21,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/08/2020</text:p>
          </table:table-cell>
          <table:table-cell table:style-name="ce3" office:value-type="string" calcext:value-type="string">
            <text:p>ACHAT CB PADRO CRF CITY 13.08.20 CARTE NUMERO <text:s text:c="15"/>742 <text:s/></text:p>
          </table:table-cell>
          <table:table-cell table:style-name="ce3" office:value-type="float" office:value="-5.42" calcext:value-type="float">
            <text:p>-5,42</text:p>
          </table:table-cell>
          <table:table-cell table:style-name="ce3" office:value-type="float" office:value="-35.55" calcext:value-type="float">
            <text:p>-35,55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14/08/2020</text:p>
          </table:table-cell>
          <table:table-cell office:value-type="string" calcext:value-type="string">
            <text:p>ACHAT CB BRIVIN <text:s text:c="8"/>13.08.20 CARTE NUMERO <text:s text:c="15"/>742 <text:s/></text:p>
          </table:table-cell>
          <table:table-cell office:value-type="float" office:value="-1.1" calcext:value-type="float">
            <text:p>-1,1</text:p>
          </table:table-cell>
          <table:table-cell office:value-type="float" office:value="-7.22" calcext:value-type="float">
            <text:p>-7,2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print-date>2020-09-12T02:47:06.847000000</meta:print-date>
    <dc:date>2020-09-12T04:24:50.937000000</dc:date>
    <meta:editing-duration>PT1H34M15S</meta:editing-duration>
    <meta:editing-cycles>1</meta:editing-cycles>
    <meta:document-statistic meta:table-count="1" meta:cell-count="272" meta:object-count="0"/>
    <meta:generator>LibreOffice/6.4.4.2$Windows_X86_64 LibreOffice_project/3d775be2011f3886db32dfd395a6a6d1ca2630ff</meta:generator>
  </office:meta>
</office:document-meta>
</file>